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9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1pt" fo:font-weight="normal" style:font-size-asian="11pt" style:font-weight-asian="normal" style:font-weight-complex="normal"/>
    </style:style>
    <style:style style:name="ce16" style:family="table-cell" style:parent-style-name="Default">
      <style:text-properties style:font-name="Liberation Sans" fo:font-size="11pt" fo:font-weight="normal" style:font-size-asian="11pt" style:font-weight-asian="normal" style:font-weight-complex="normal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fo:font-weight="normal" style:font-size-asian="11pt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normal" style:font-weight-asian="normal" style:font-weight-complex="normal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"/>
    </style:style>
    <style:style style:name="T1" style:family="text">
      <style:text-properties style:use-window-font-color="true" style:font-name="Calibri" style:letter-kerning="false" fo:language="en" fo:country="US" style:language-asian="zh" style:country-asian="CN" style:font-size-asian="11pt"/>
    </style:style>
    <style:style style:name="T2" style:family="text">
      <style:text-properties style:use-window-font-color="true" style:font-name="Calibri" style:letter-kerning="false" fo:language="en" fo:country="US" style:font-size-asian="11pt" style:language-asian="ja" style:country-asian="JP"/>
    </style:style>
    <style:style style:name="T3" style:family="text">
      <style:text-properties style:use-window-font-color="true" style:font-name="Calibri" style:letter-kerning="false" fo:language="en" fo:country="US" style:font-size-asian="11pt" style:language-asian="zh" style:country-asian="CN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ter_angle_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5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/>
          <table:table-cell table:style-name="ce4" office:value-type="string" calcext:value-type="string">
            <text:p>Planner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Path length </text:p>
            <text:p>(m)</text:p>
          </table:table-cell>
          <table:table-cell table:style-name="ce30" office:value-type="string" calcext:value-type="string">
            <text:p>Path irregularity </text:p>
            <text:p>(rad/m)</text:p>
          </table:table-cell>
          <table:table-cell table:style-name="ce30" office:value-type="string" calcext:value-type="string" table:number-columns-spanned="2" table:number-rows-spanned="1">
            <text:p>Closest-pedestrian distance </text:p>
            <text:p>(m) [mean, std]</text:p>
          </table:table-cell>
          <table:covered-table-cell table:style-name="ce30"/>
          <table:table-cell table:style-name="ce50" office:value-type="string" calcext:value-type="string" table:number-columns-spanned="3" table:number-rows-spanned="1">
            <text:p><text:span text:style-name="T1">Minimum </text:span><text:span text:style-name="T2">t</text:span><text:span text:style-name="T3">ime-to-collision </text:span></text:p>
            <text:p><text:span text:style-name="T4">(s) [mean, std, number of collision]</text:span></text:p>
          </table:table-cell>
          <table:covered-table-cell table:number-columns-repeated="2" table:style-name="ce50"/>
          <table:table-cell table:number-columns-repeated="2"/>
        </table:table-row>
        <table:table-row table:style-name="ro2">
          <table:table-cell table:style-name="ce8" office:value-type="string" calcext:value-type="string" table:number-columns-spanned="1" table:number-rows-spanned="5">
            <text:p>python3 dataset.py --k_horizon_frames 60 --d_thresh 2.5 --node_inclusion_radius 50 --normalize_node_features --normalize_labels --filter_angle 45</text:p>
          </table:table-cell>
          <table:table-cell/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corridor_1</text:p>
          </table:table-cell>
          <table:table-cell table:style-name="ce9" office:value-type="float" office:value="33.668118" calcext:value-type="float">
            <text:p>33.668118</text:p>
          </table:table-cell>
          <table:table-cell table:style-name="ce15" office:value-type="float" office:value="0.261557" calcext:value-type="float">
            <text:p>0.261557</text:p>
          </table:table-cell>
          <table:table-cell table:style-name="ce9" office:value-type="float" office:value="1.681967" calcext:value-type="float">
            <text:p>1.681967</text:p>
          </table:table-cell>
          <table:table-cell table:style-name="ce9" office:value-type="float" office:value="0.608194" calcext:value-type="float">
            <text:p>0.608194</text:p>
          </table:table-cell>
          <table:table-cell table:style-name="ce23" office:value-type="float" office:value="0.189296" calcext:value-type="float">
            <text:p>0.189296</text:p>
          </table:table-cell>
          <table:table-cell table:style-name="ce23" office:value-type="float" office:value="0.440694" calcext:value-type="float">
            <text:p>0.440694</text:p>
          </table:table-cell>
          <table:table-cell table:style-name="ce23" office:value-type="float" office:value="65" calcext:value-type="float">
            <text:p>65</text:p>
          </table:table-cell>
          <table:table-cell table:style-name="ce2" table:number-columns-repeated="2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corridor_2</text:p>
          </table:table-cell>
          <table:table-cell table:style-name="ce10" office:value-type="float" office:value="33.821171" calcext:value-type="float">
            <text:p>33.821171</text:p>
          </table:table-cell>
          <table:table-cell table:style-name="ce16" office:value-type="float" office:value="0.293578" calcext:value-type="float">
            <text:p>0.293578</text:p>
          </table:table-cell>
          <table:table-cell table:style-name="ce10" office:value-type="float" office:value="1.753301" calcext:value-type="float">
            <text:p>1.753301</text:p>
          </table:table-cell>
          <table:table-cell table:style-name="ce10" office:value-type="float" office:value="0.486764" calcext:value-type="float">
            <text:p>0.486764</text:p>
          </table:table-cell>
          <table:table-cell table:style-name="ce24" office:value-type="float" office:value="0.464243" calcext:value-type="float">
            <text:p>0.464243</text:p>
          </table:table-cell>
          <table:table-cell table:style-name="ce24" office:value-type="float" office:value="0.018731" calcext:value-type="float">
            <text:p>0.018731</text:p>
          </table:table-cell>
          <table:table-cell table:style-name="ce24" office:value-type="float" office:value="69" calcext:value-type="float">
            <text:p>69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node_inclusion_radius</text:p>
          </table:table-cell>
          <table:table-cell/>
          <table:table-cell office:value-type="string" calcext:value-type="string">
            <text:p>hg_1</text:p>
          </table:table-cell>
          <table:table-cell table:style-name="ce10" office:value-type="float" office:value="32.676968" calcext:value-type="float">
            <text:p>32.676968</text:p>
          </table:table-cell>
          <table:table-cell table:style-name="ce16" office:value-type="float" office:value="0.606449" calcext:value-type="float">
            <text:p>0.606449</text:p>
          </table:table-cell>
          <table:table-cell table:style-name="ce10" office:value-type="float" office:value="1.819331" calcext:value-type="float">
            <text:p>1.819331</text:p>
          </table:table-cell>
          <table:table-cell table:style-name="ce10" office:value-type="float" office:value="0.54531" calcext:value-type="float">
            <text:p>0.54531</text:p>
          </table:table-cell>
          <table:table-cell table:style-name="ce24" office:value-type="float" office:value="1.675695" calcext:value-type="float">
            <text:p>1.675695</text:p>
          </table:table-cell>
          <table:table-cell table:style-name="ce24" office:value-type="float" office:value="3.737351" calcext:value-type="float">
            <text:p>3.737351</text:p>
          </table:table-cell>
          <table:table-cell table:style-name="ce24" office:value-type="float" office:value="73" calcext:value-type="float">
            <text:p>73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other k_horizon_frames</text:p>
          </table:table-cell>
          <table:table-cell/>
          <table:table-cell office:value-type="string" calcext:value-type="string">
            <text:p>hg_2</text:p>
          </table:table-cell>
          <table:table-cell table:style-name="ce10" office:value-type="float" office:value="34.613213" calcext:value-type="float">
            <text:p>34.613213</text:p>
          </table:table-cell>
          <table:table-cell table:style-name="ce16" office:value-type="float" office:value="0.470236" calcext:value-type="float">
            <text:p>0.470236</text:p>
          </table:table-cell>
          <table:table-cell table:style-name="ce10" office:value-type="float" office:value="2.062155" calcext:value-type="float">
            <text:p>2.062155</text:p>
          </table:table-cell>
          <table:table-cell table:style-name="ce10" office:value-type="float" office:value="0.382998" calcext:value-type="float">
            <text:p>0.382998</text:p>
          </table:table-cell>
          <table:table-cell table:style-name="ce24" office:value-type="float" office:value="3.83069" calcext:value-type="float">
            <text:p>3.83069</text:p>
          </table:table-cell>
          <table:table-cell table:style-name="ce24" office:value-type="float" office:value="4.171971" calcext:value-type="float">
            <text:p>4.171971</text:p>
          </table:table-cell>
          <table:table-cell table:style-name="ce24" office:value-type="float" office:value="13" calcext:value-type="float">
            <text:p>13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other angle</text:p>
          </table:table-cell>
          <table:table-cell/>
          <table:table-cell office:value-type="string" calcext:value-type="string">
            <text:p>indoor</text:p>
          </table:table-cell>
          <table:table-cell table:style-name="ce10" office:value-type="float" office:value="3.073521" calcext:value-type="float">
            <text:p>3.073521</text:p>
          </table:table-cell>
          <table:table-cell table:style-name="ce16" office:value-type="float" office:value="9.326343" calcext:value-type="float">
            <text:p>9.326343</text:p>
          </table:table-cell>
          <table:table-cell table:style-name="ce10" office:value-type="float" office:value="2.208152" calcext:value-type="float">
            <text:p>2.208152</text:p>
          </table:table-cell>
          <table:table-cell table:style-name="ce10" office:value-type="float" office:value="0.164628" calcext:value-type="float">
            <text:p>0.164628</text:p>
          </table:table-cell>
          <table:table-cell table:style-name="ce24" office:value-type="float" office:value="5.957087" calcext:value-type="float">
            <text:p>5.957087</text:p>
          </table:table-cell>
          <table:table-cell table:style-name="ce24" office:value-type="float" office:value="2.946084" calcext:value-type="float">
            <text:p>2.946084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amp_1</text:p>
          </table:table-cell>
          <table:table-cell table:style-name="ce10" office:value-type="float" office:value="51.892632" calcext:value-type="float">
            <text:p>51.892632</text:p>
          </table:table-cell>
          <table:table-cell table:style-name="ce16" office:value-type="float" office:value="0.218195" calcext:value-type="float">
            <text:p>0.218195</text:p>
          </table:table-cell>
          <table:table-cell table:style-name="ce10" office:value-type="float" office:value="1.714876" calcext:value-type="float">
            <text:p>1.714876</text:p>
          </table:table-cell>
          <table:table-cell table:style-name="ce10" office:value-type="float" office:value="0.437352" calcext:value-type="float">
            <text:p>0.437352</text:p>
          </table:table-cell>
          <table:table-cell table:style-name="ce24" office:value-type="float" office:value="0.269784" calcext:value-type="float">
            <text:p>0.269784</text:p>
          </table:table-cell>
          <table:table-cell table:style-name="ce24" office:value-type="float" office:value="0.408002" calcext:value-type="float">
            <text:p>0.408002</text:p>
          </table:table-cell>
          <table:table-cell table:style-name="ce24" office:value-type="float" office:value="41" calcext:value-type="float">
            <text:p>41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train</text:p>
          </table:table-cell>
          <table:table-cell table:number-columns-repeated="2"/>
          <table:table-cell office:value-type="string" calcext:value-type="string">
            <text:p>ramp_2</text:p>
          </table:table-cell>
          <table:table-cell table:style-name="ce10" office:value-type="float" office:value="31.947905" calcext:value-type="float">
            <text:p>31.947905</text:p>
          </table:table-cell>
          <table:table-cell table:style-name="ce16" office:value-type="float" office:value="0.240815" calcext:value-type="float">
            <text:p>0.240815</text:p>
          </table:table-cell>
          <table:table-cell table:style-name="ce10" office:value-type="float" office:value="1.591896" calcext:value-type="float">
            <text:p>1.591896</text:p>
          </table:table-cell>
          <table:table-cell table:style-name="ce10" office:value-type="float" office:value="0.479642" calcext:value-type="float">
            <text:p>0.479642</text:p>
          </table:table-cell>
          <table:table-cell table:style-name="ce24" office:value-type="float" office:value="0.375424" calcext:value-type="float">
            <text:p>0.375424</text:p>
          </table:table-cell>
          <table:table-cell table:style-name="ce24" office:value-type="float" office:value="0.647217" calcext:value-type="float">
            <text:p>0.647217</text:p>
          </table:table-cell>
          <table:table-cell table:style-name="ce24" office:value-type="float" office:value="93" calcext:value-type="float">
            <text:p>93</text:p>
          </table:table-cell>
          <table:table-cell table:style-name="ce2" table:number-columns-repeated="2"/>
        </table:table-row>
        <table:table-row table:style-name="ro2">
          <table:table-cell table:style-name="ce48" office:value-type="string" calcext:value-type="string" table:number-columns-spanned="1" table:number-rows-spanned="12">
            <text:p>python3 train.py --batch_size 256 --epochs 60 --lr 5e-4 --weight_decay 1e-4 --hidden_dim 64 --filtered_files_json data/filtered_files.json --num_layers 1 --model SocialForceGNN --consistency_loss --lambda_cons 0.0 --dropout_p 0.1</text:p>
          </table:table-cell>
          <table:table-cell table:number-columns-repeated="2"/>
          <table:table-cell table:style-name="ce6" office:value-type="string" calcext:value-type="string">
            <text:p>stairs</text:p>
          </table:table-cell>
          <table:table-cell office:value-type="float" office:value="105.145955" calcext:value-type="float">
            <text:p>105.145955</text:p>
          </table:table-cell>
          <table:table-cell table:style-name="ce16" office:value-type="float" office:value="1.786608" calcext:value-type="float">
            <text:p>1.786608</text:p>
          </table:table-cell>
          <table:table-cell table:style-name="ce10" office:value-type="float" office:value="1.847872" calcext:value-type="float">
            <text:p>1.847872</text:p>
          </table:table-cell>
          <table:table-cell table:style-name="ce10" office:value-type="float" office:value="0.517463" calcext:value-type="float">
            <text:p>0.517463</text:p>
          </table:table-cell>
          <table:table-cell table:style-name="ce24" office:value-type="float" office:value="2.16889" calcext:value-type="float">
            <text:p>2.16889</text:p>
          </table:table-cell>
          <table:table-cell table:style-name="ce24" office:value-type="float" office:value="3.982571" calcext:value-type="float">
            <text:p>3.982571</text:p>
          </table:table-cell>
          <table:table-cell table:style-name="ce24" office:value-type="float" office:value="145" calcext:value-type="float">
            <text:p>145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table-cell table:style-name="ce7"/>
          <table:table-cell table:style-name="ce7" office:value-type="string" calcext:value-type="string">
            <text:p>double</text:p>
          </table:table-cell>
          <table:table-cell table:style-name="ce11" office:value-type="float" office:value="58.956859" calcext:value-type="float">
            <text:p>58.956859</text:p>
          </table:table-cell>
          <table:table-cell table:style-name="ce17" office:value-type="float" office:value="7.22425" calcext:value-type="float">
            <text:p>7.22425</text:p>
          </table:table-cell>
          <table:table-cell table:style-name="ce11" office:value-type="float" office:value="1.556608" calcext:value-type="float">
            <text:p>1.556608</text:p>
          </table:table-cell>
          <table:table-cell table:style-name="ce11" office:value-type="float" office:value="0.490656" calcext:value-type="float">
            <text:p>0.490656</text:p>
          </table:table-cell>
          <table:table-cell table:style-name="ce25" office:value-type="float" office:value="0.439293" calcext:value-type="float">
            <text:p>0.439293</text:p>
          </table:table-cell>
          <table:table-cell table:style-name="ce25" office:value-type="float" office:value="1.169682" calcext:value-type="float">
            <text:p>1.169682</text:p>
          </table:table-cell>
          <table:table-cell table:style-name="ce25" office:value-type="float" office:value="535" calcext:value-type="float">
            <text:p>535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7" table:number-columns-repeated="2"/>
          <table:table-cell table:style-name="ce11" table:formula="of:=AVERAGE([.E2:.E5];[.E7:.E9])" office:value-type="float" office:value="46.2522802857143" calcext:value-type="float">
            <text:p>46.2522802857143</text:p>
          </table:table-cell>
          <table:table-cell table:style-name="ce11" table:formula="of:=AVERAGE([.F2:.F5];[.F7:.F9])" office:value-type="float" office:value="0.553919714285714" calcext:value-type="float">
            <text:p>0.553919714285714</text:p>
          </table:table-cell>
          <table:table-cell table:style-name="ce11" table:formula="of:=AVERAGE([.G2:.G5];[.G7:.G9])" office:value-type="float" office:value="1.78162828571429" calcext:value-type="float">
            <text:p>1.78162828571429</text:p>
          </table:table-cell>
          <table:table-cell table:style-name="ce11" table:formula="of:=AVERAGE([.H2:.H5];[.H7:.H9])" office:value-type="float" office:value="0.493960428571429" calcext:value-type="float">
            <text:p>0.493960428571429</text:p>
          </table:table-cell>
          <table:table-cell table:style-name="ce11" table:formula="of:=AVERAGE([.I2:.I5];[.I7:.I9])" office:value-type="float" office:value="1.28200314285714" calcext:value-type="float">
            <text:p>1.28200314285714</text:p>
          </table:table-cell>
          <table:table-cell table:style-name="ce11" table:formula="of:=AVERAGE([.J2:.J5];[.J7:.J9])" office:value-type="float" office:value="1.91521957142857" calcext:value-type="float">
            <text:p>1.91521957142857</text:p>
          </table:table-cell>
          <table:table-cell table:style-name="ce11" table:formula="of:=AVERAGE([.K2:.K5];[.K7:.K9])" office:value-type="float" office:value="71.2857142857143" calcext:value-type="float">
            <text:p>71.2857142857143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5" office:value-type="string" calcext:value-type="string">
            <text:p>GNN</text:p>
          </table:table-cell>
          <table:table-cell table:style-name="ce32" office:value-type="string" calcext:value-type="string">
            <text:p>corridor_1</text:p>
          </table:table-cell>
          <table:table-cell table:style-name="ce9" office:value-type="float" office:value="35.423125" calcext:value-type="float">
            <text:p>35.423125</text:p>
          </table:table-cell>
          <table:table-cell table:style-name="ce9" office:value-type="float" office:value="1.291939" calcext:value-type="float">
            <text:p>1.291939</text:p>
          </table:table-cell>
          <table:table-cell table:style-name="ce9" office:value-type="float" office:value="1.722423" calcext:value-type="float">
            <text:p>1.722423</text:p>
          </table:table-cell>
          <table:table-cell table:style-name="ce9" office:value-type="float" office:value="0.636783" calcext:value-type="float">
            <text:p>0.636783</text:p>
          </table:table-cell>
          <table:table-cell table:style-name="ce23" office:value-type="float" office:value="0.194175" calcext:value-type="float">
            <text:p>0.194175</text:p>
          </table:table-cell>
          <table:table-cell table:style-name="ce23" office:value-type="float" office:value="0.483584" calcext:value-type="float">
            <text:p>0.483584</text:p>
          </table:table-cell>
          <table:table-cell table:style-name="ce23" office:value-type="float" office:value="57" calcext:value-type="float">
            <text:p>57</text:p>
          </table:table-cell>
          <table:table-cell table:style-name="ce2"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corridor_2</text:p>
          </table:table-cell>
          <table:table-cell table:style-name="ce10" office:value-type="float" office:value="35.450495" calcext:value-type="float">
            <text:p>35.450495</text:p>
          </table:table-cell>
          <table:table-cell table:style-name="ce10" office:value-type="float" office:value="1.360858" calcext:value-type="float">
            <text:p>1.360858</text:p>
          </table:table-cell>
          <table:table-cell table:style-name="ce10" office:value-type="float" office:value="1.801062" calcext:value-type="float">
            <text:p>1.801062</text:p>
          </table:table-cell>
          <table:table-cell table:style-name="ce10" office:value-type="float" office:value="0.480255" calcext:value-type="float">
            <text:p>0.480255</text:p>
          </table:table-cell>
          <table:table-cell table:style-name="ce24" office:value-type="float" office:value="0.605936" calcext:value-type="float">
            <text:p>0.605936</text:p>
          </table:table-cell>
          <table:table-cell table:style-name="ce24" office:value-type="float" office:value="1.023798" calcext:value-type="float">
            <text:p>1.023798</text:p>
          </table:table-cell>
          <table:table-cell table:style-name="ce24" office:value-type="float" office:value="63" calcext:value-type="float">
            <text:p>63</text:p>
          </table:table-cell>
          <table:table-cell table:style-name="ce2"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1</text:p>
          </table:table-cell>
          <table:table-cell office:value-type="float" office:value="33.699482" calcext:value-type="float">
            <text:p>33.699482</text:p>
          </table:table-cell>
          <table:table-cell office:value-type="float" office:value="1.392056" calcext:value-type="float">
            <text:p>1.392056</text:p>
          </table:table-cell>
          <table:table-cell office:value-type="float" office:value="1.827786" calcext:value-type="float">
            <text:p>1.827786</text:p>
          </table:table-cell>
          <table:table-cell office:value-type="float" office:value="0.542788" calcext:value-type="float">
            <text:p>0.542788</text:p>
          </table:table-cell>
          <table:table-cell office:value-type="float" office:value="1.762196" calcext:value-type="float">
            <text:p>1.762196</text:p>
          </table:table-cell>
          <table:table-cell office:value-type="float" office:value="3.782848" calcext:value-type="float">
            <text:p>3.7828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2</text:p>
          </table:table-cell>
          <table:table-cell office:value-type="float" office:value="35.641725" calcext:value-type="float">
            <text:p>35.641725</text:p>
          </table:table-cell>
          <table:table-cell office:value-type="float" office:value="1.230715" calcext:value-type="float">
            <text:p>1.230715</text:p>
          </table:table-cell>
          <table:table-cell office:value-type="float" office:value="2.075354" calcext:value-type="float">
            <text:p>2.075354</text:p>
          </table:table-cell>
          <table:table-cell office:value-type="float" office:value="0.347884" calcext:value-type="float">
            <text:p>0.347884</text:p>
          </table:table-cell>
          <table:table-cell office:value-type="float" office:value="4.825362" calcext:value-type="float">
            <text:p>4.825362</text:p>
          </table:table-cell>
          <table:table-cell office:value-type="float" office:value="3.924625" calcext:value-type="float">
            <text:p>3.9246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indoor</text:p>
          </table:table-cell>
          <table:table-cell table:style-name="ce10" office:value-type="float" office:value="3.820557" calcext:value-type="float">
            <text:p>3.820557</text:p>
          </table:table-cell>
          <table:table-cell table:style-name="ce16" office:value-type="float" office:value="9.610601" calcext:value-type="float">
            <text:p>9.610601</text:p>
          </table:table-cell>
          <table:table-cell table:style-name="ce10" office:value-type="float" office:value="2.203683" calcext:value-type="float">
            <text:p>2.203683</text:p>
          </table:table-cell>
          <table:table-cell table:style-name="ce10" office:value-type="float" office:value="0.174977" calcext:value-type="float">
            <text:p>0.174977</text:p>
          </table:table-cell>
          <table:table-cell table:style-name="ce24" office:value-type="float" office:value="5.908572" calcext:value-type="float">
            <text:p>5.908572</text:p>
          </table:table-cell>
          <table:table-cell table:style-name="ce24" office:value-type="float" office:value="2.91781" calcext:value-type="float">
            <text:p>2.9178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ramp_1</text:p>
          </table:table-cell>
          <table:table-cell office:value-type="float" office:value="54.808254" calcext:value-type="float">
            <text:p>54.808254</text:p>
          </table:table-cell>
          <table:table-cell office:value-type="float" office:value="1.114161" calcext:value-type="float">
            <text:p>1.114161</text:p>
          </table:table-cell>
          <table:table-cell office:value-type="float" office:value="1.78991" calcext:value-type="float">
            <text:p>1.78991</text:p>
          </table:table-cell>
          <table:table-cell office:value-type="float" office:value="0.44834" calcext:value-type="float">
            <text:p>0.44834</text:p>
          </table:table-cell>
          <table:table-cell office:value-type="float" office:value="0.344477" calcext:value-type="float">
            <text:p>0.344477</text:p>
          </table:table-cell>
          <table:table-cell office:value-type="float" office:value="0.474992" calcext:value-type="float">
            <text:p>0.4749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ramp_2</text:p>
          </table:table-cell>
          <table:table-cell office:value-type="float" office:value="33.854351" calcext:value-type="float">
            <text:p>33.854351</text:p>
          </table:table-cell>
          <table:table-cell office:value-type="float" office:value="1.152599" calcext:value-type="float">
            <text:p>1.152599</text:p>
          </table:table-cell>
          <table:table-cell office:value-type="float" office:value="1.685834" calcext:value-type="float">
            <text:p>1.685834</text:p>
          </table:table-cell>
          <table:table-cell office:value-type="float" office:value="0.453717" calcext:value-type="float">
            <text:p>0.453717</text:p>
          </table:table-cell>
          <table:table-cell office:value-type="float" office:value="0.479489" calcext:value-type="float">
            <text:p>0.479489</text:p>
          </table:table-cell>
          <table:table-cell office:value-type="float" office:value="0.711139" calcext:value-type="float">
            <text:p>0.71113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stairs</text:p>
          </table:table-cell>
          <table:table-cell office:value-type="float" office:value="107.58049" calcext:value-type="float">
            <text:p>107.58049</text:p>
          </table:table-cell>
          <table:table-cell office:value-type="float" office:value="1.961691" calcext:value-type="float">
            <text:p>1.961691</text:p>
          </table:table-cell>
          <table:table-cell office:value-type="float" office:value="1.872888" calcext:value-type="float">
            <text:p>1.872888</text:p>
          </table:table-cell>
          <table:table-cell office:value-type="float" office:value="0.513328" calcext:value-type="float">
            <text:p>0.513328</text:p>
          </table:table-cell>
          <table:table-cell office:value-type="float" office:value="2.355451" calcext:value-type="float">
            <text:p>2.355451</text:p>
          </table:table-cell>
          <table:table-cell office:value-type="float" office:value="4.296514" calcext:value-type="float">
            <text:p>4.29651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3">
          <table:covered-table-cell table:style-name="ce19"/>
          <table:table-cell office:value-type="string" calcext:value-type="string">
            <text:p>add attention mechanisms</text:p>
          </table:table-cell>
          <table:table-cell table:style-name="ce7"/>
          <table:table-cell table:style-name="ce33" office:value-type="string" calcext:value-type="string">
            <text:p>double</text:p>
          </table:table-cell>
          <table:table-cell table:style-name="ce13" office:value-type="float" office:value="62.950126" calcext:value-type="float">
            <text:p>62.950126</text:p>
          </table:table-cell>
          <table:table-cell table:style-name="ce13" office:value-type="float" office:value="5.576714" calcext:value-type="float">
            <text:p>5.576714</text:p>
          </table:table-cell>
          <table:table-cell table:style-name="ce13" office:value-type="float" office:value="1.571644" calcext:value-type="float">
            <text:p>1.571644</text:p>
          </table:table-cell>
          <table:table-cell table:style-name="ce13" office:value-type="float" office:value="0.493213" calcext:value-type="float">
            <text:p>0.493213</text:p>
          </table:table-cell>
          <table:table-cell table:style-name="ce27" office:value-type="float" office:value="0.453955" calcext:value-type="float">
            <text:p>0.453955</text:p>
          </table:table-cell>
          <table:table-cell table:style-name="ce27" office:value-type="float" office:value="1.184125" calcext:value-type="float">
            <text:p>1.184125</text:p>
          </table:table-cell>
          <table:table-cell table:style-name="ce27" office:value-type="float" office:value="521" calcext:value-type="float">
            <text:p>521</text:p>
          </table:table-cell>
          <table:table-cell table:number-columns-repeated="2"/>
        </table:table-row>
        <table:table-row table:style-name="ro3">
          <table:table-cell table:style-name="ce19"/>
          <table:table-cell/>
          <table:table-cell table:style-name="ce7"/>
          <table:table-cell table:style-name="ce61"/>
          <table:table-cell table:style-name="ce13" table:formula="of:=AVERAGE([.E12:.E15];[.E17:.E19])" office:value-type="float" office:value="48.0654174285714" calcext:value-type="float">
            <text:p>48.0654174285714</text:p>
          </table:table-cell>
          <table:table-cell table:style-name="ce13" table:formula="of:=AVERAGE([.F12:.F15];[.F17:.F19])" office:value-type="float" office:value="1.357717" calcext:value-type="float">
            <text:p>1.357717</text:p>
          </table:table-cell>
          <table:table-cell table:style-name="ce13" table:formula="of:=AVERAGE([.G12:.G15];[.G17:.G19])" office:value-type="float" office:value="1.82503671428571" calcext:value-type="float">
            <text:p>1.82503671428571</text:p>
          </table:table-cell>
          <table:table-cell table:style-name="ce13" table:formula="of:=AVERAGE([.H12:.H15];[.H17:.H19])" office:value-type="float" office:value="0.489013571428571" calcext:value-type="float">
            <text:p>0.489013571428571</text:p>
          </table:table-cell>
          <table:table-cell table:style-name="ce13" table:formula="of:=AVERAGE([.I12:.I15];[.I17:.I19])" office:value-type="float" office:value="1.50958371428571" calcext:value-type="float">
            <text:p>1.50958371428571</text:p>
          </table:table-cell>
          <table:table-cell table:style-name="ce13" table:formula="of:=AVERAGE([.J12:.J15];[.J17:.J19])" office:value-type="float" office:value="2.09964285714286" calcext:value-type="float">
            <text:p>2.09964285714286</text:p>
          </table:table-cell>
          <table:table-cell table:style-name="ce13" table:formula="of:=AVERAGE([.K12:.K15];[.K17:.K1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SFM</text:p>
          </table:table-cell>
          <table:table-cell table:style-name="ce5" office:value-type="string" calcext:value-type="string">
            <text:p>corridor_1</text:p>
          </table:table-cell>
          <table:table-cell table:style-name="ce14" office:value-type="float" office:value="35.263098" calcext:value-type="float">
            <text:p>35.263098</text:p>
          </table:table-cell>
          <table:table-cell table:style-name="ce14" office:value-type="float" office:value="1.060105" calcext:value-type="float">
            <text:p>1.060105</text:p>
          </table:table-cell>
          <table:table-cell table:style-name="ce14" office:value-type="float" office:value="1.725862" calcext:value-type="float">
            <text:p>1.725862</text:p>
          </table:table-cell>
          <table:table-cell table:style-name="ce14" office:value-type="float" office:value="0.568643" calcext:value-type="float">
            <text:p>0.568643</text:p>
          </table:table-cell>
          <table:table-cell table:style-name="ce28" office:value-type="float" office:value="0.197922" calcext:value-type="float">
            <text:p>0.197922</text:p>
          </table:table-cell>
          <table:table-cell table:style-name="ce28" office:value-type="float" office:value="0.455124" calcext:value-type="float">
            <text:p>0.455124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rack</text:p>
          </table:table-cell>
          <table:table-cell office:value-type="string" calcext:value-type="string">
            <text:p>kalman filter params</text:p>
          </table:table-cell>
          <table:table-cell/>
          <table:table-cell table:style-name="ce6" office:value-type="string" calcext:value-type="string">
            <text:p>corridor_2</text:p>
          </table:table-cell>
          <table:table-cell office:value-type="float" office:value="37.131178" calcext:value-type="float">
            <text:p>37.131178</text:p>
          </table:table-cell>
          <table:table-cell office:value-type="float" office:value="1.622214" calcext:value-type="float">
            <text:p>1.622214</text:p>
          </table:table-cell>
          <table:table-cell office:value-type="float" office:value="1.783201" calcext:value-type="float">
            <text:p>1.783201</text:p>
          </table:table-cell>
          <table:table-cell office:value-type="float" office:value="0.461332" calcext:value-type="float">
            <text:p>0.461332</text:p>
          </table:table-cell>
          <table:table-cell office:value-type="float" office:value="0.694913" calcext:value-type="float">
            <text:p>0.694913</text:p>
          </table:table-cell>
          <table:table-cell office:value-type="float" office:value="1.322666" calcext:value-type="float">
            <text:p>1.32266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1" table:number-rows-spanned="3">
            <text:p>python3 offset_plot_ekf.py --visualize --min-sensor-distance 2.5 --max-pedestrians 1</text:p>
          </table:table-cell>
          <table:table-cell table:number-columns-repeated="2"/>
          <table:table-cell table:style-name="ce6" office:value-type="string" calcext:value-type="string">
            <text:p>hg_1</text:p>
          </table:table-cell>
          <table:table-cell office:value-type="float" office:value="40.911672" calcext:value-type="float">
            <text:p>40.911672</text:p>
          </table:table-cell>
          <table:table-cell office:value-type="float" office:value="2.743727" calcext:value-type="float">
            <text:p>2.743727</text:p>
          </table:table-cell>
          <table:table-cell office:value-type="float" office:value="1.862606" calcext:value-type="float">
            <text:p>1.862606</text:p>
          </table:table-cell>
          <table:table-cell office:value-type="float" office:value="0.510023" calcext:value-type="float">
            <text:p>0.510023</text:p>
          </table:table-cell>
          <table:table-cell office:value-type="float" office:value="1.535692" calcext:value-type="float">
            <text:p>1.535692</text:p>
          </table:table-cell>
          <table:table-cell office:value-type="float" office:value="3.418537" calcext:value-type="float">
            <text:p>3.41853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table:style-name="ce6" office:value-type="string" calcext:value-type="string">
            <text:p>hg_2</text:p>
          </table:table-cell>
          <table:table-cell office:value-type="float" office:value="36.614514" calcext:value-type="float">
            <text:p>36.614514</text:p>
          </table:table-cell>
          <table:table-cell office:value-type="float" office:value="1.316096" calcext:value-type="float">
            <text:p>1.316096</text:p>
          </table:table-cell>
          <table:table-cell office:value-type="float" office:value="2.086505" calcext:value-type="float">
            <text:p>2.08650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.454696" calcext:value-type="float">
            <text:p>4.454696</text:p>
          </table:table-cell>
          <table:table-cell office:value-type="float" office:value="4.433152" calcext:value-type="float">
            <text:p>4.43315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table:style-name="ce6" office:value-type="string" calcext:value-type="string">
            <text:p>indoor</text:p>
          </table:table-cell>
          <table:table-cell office:value-type="float" office:value="3.10473" calcext:value-type="float">
            <text:p>3.10473</text:p>
          </table:table-cell>
          <table:table-cell office:value-type="float" office:value="14.300254" calcext:value-type="float">
            <text:p>14.300254</text:p>
          </table:table-cell>
          <table:table-cell office:value-type="float" office:value="2.220832" calcext:value-type="float">
            <text:p>2.220832</text:p>
          </table:table-cell>
          <table:table-cell office:value-type="float" office:value="0.164653" calcext:value-type="float">
            <text:p>0.164653</text:p>
          </table:table-cell>
          <table:table-cell office:value-type="float" office:value="6.071169" calcext:value-type="float">
            <text:p>6.071169</text:p>
          </table:table-cell>
          <table:table-cell office:value-type="float" office:value="2.891096" calcext:value-type="float">
            <text:p>2.8910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ramp_1</text:p>
          </table:table-cell>
          <table:table-cell office:value-type="float" office:value="62.459411" calcext:value-type="float">
            <text:p>62.459411</text:p>
          </table:table-cell>
          <table:table-cell office:value-type="float" office:value="2.047034" calcext:value-type="float">
            <text:p>2.047034</text:p>
          </table:table-cell>
          <table:table-cell office:value-type="float" office:value="1.750033" calcext:value-type="float">
            <text:p>1.750033</text:p>
          </table:table-cell>
          <table:table-cell office:value-type="float" office:value="0.429787" calcext:value-type="float">
            <text:p>0.429787</text:p>
          </table:table-cell>
          <table:table-cell office:value-type="float" office:value="0.55613" calcext:value-type="float">
            <text:p>0.55613</text:p>
          </table:table-cell>
          <table:table-cell office:value-type="float" office:value="1.195404" calcext:value-type="float">
            <text:p>1.19540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eval</text:p>
          </table:table-cell>
          <table:table-cell table:number-columns-repeated="2"/>
          <table:table-cell table:style-name="ce6" office:value-type="string" calcext:value-type="string">
            <text:p>ramp_2</text:p>
          </table:table-cell>
          <table:table-cell office:value-type="float" office:value="34.159032" calcext:value-type="float">
            <text:p>34.159032</text:p>
          </table:table-cell>
          <table:table-cell office:value-type="float" office:value="1.281411" calcext:value-type="float">
            <text:p>1.281411</text:p>
          </table:table-cell>
          <table:table-cell office:value-type="float" office:value="1.633888" calcext:value-type="float">
            <text:p>1.633888</text:p>
          </table:table-cell>
          <table:table-cell office:value-type="float" office:value="0.476505" calcext:value-type="float">
            <text:p>0.476505</text:p>
          </table:table-cell>
          <table:table-cell office:value-type="float" office:value="0.408895" calcext:value-type="float">
            <text:p>0.408895</text:p>
          </table:table-cell>
          <table:table-cell office:value-type="float" office:value="0.66935" calcext:value-type="float">
            <text:p>0.6693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ython3 evaluate.py --collision-radius 1.2</text:p>
          </table:table-cell>
          <table:table-cell table:number-columns-repeated="2"/>
          <table:table-cell table:style-name="ce6" office:value-type="string" calcext:value-type="string">
            <text:p>stairs</text:p>
          </table:table-cell>
          <table:table-cell office:value-type="float" office:value="114.849837" calcext:value-type="float">
            <text:p>114.849837</text:p>
          </table:table-cell>
          <table:table-cell office:value-type="float" office:value="3.439105" calcext:value-type="float">
            <text:p>3.439105</text:p>
          </table:table-cell>
          <table:table-cell office:value-type="float" office:value="1.882059" calcext:value-type="float">
            <text:p>1.882059</text:p>
          </table:table-cell>
          <table:table-cell office:value-type="float" office:value="0.486257" calcext:value-type="float">
            <text:p>0.486257</text:p>
          </table:table-cell>
          <table:table-cell office:value-type="float" office:value="2.49223" calcext:value-type="float">
            <text:p>2.49223</text:p>
          </table:table-cell>
          <table:table-cell office:value-type="float" office:value="4.286263" calcext:value-type="float">
            <text:p>4.286263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table:style-name="ce7" office:value-type="string" calcext:value-type="string">
            <text:p>double</text:p>
          </table:table-cell>
          <table:table-cell table:style-name="ce13" office:value-type="float" office:value="66.898269" calcext:value-type="float">
            <text:p>66.898269</text:p>
          </table:table-cell>
          <table:table-cell table:style-name="ce13" office:value-type="float" office:value="9.683959" calcext:value-type="float">
            <text:p>9.683959</text:p>
          </table:table-cell>
          <table:table-cell table:style-name="ce13" office:value-type="float" office:value="1.605608" calcext:value-type="float">
            <text:p>1.605608</text:p>
          </table:table-cell>
          <table:table-cell table:style-name="ce13" office:value-type="float" office:value="0.475159" calcext:value-type="float">
            <text:p>0.475159</text:p>
          </table:table-cell>
          <table:table-cell table:style-name="ce27" office:value-type="float" office:value="0.559216" calcext:value-type="float">
            <text:p>0.559216</text:p>
          </table:table-cell>
          <table:table-cell table:style-name="ce27" office:value-type="float" office:value="1.265718" calcext:value-type="float">
            <text:p>1.265718</text:p>
          </table:table-cell>
          <table:table-cell table:style-name="ce27" office:value-type="float" office:value="489" calcext:value-type="float">
            <text:p>48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x-sensor-distance</text:p>
          </table:table-cell>
          <table:table-cell table:style-name="ce7" table:number-columns-repeated="2"/>
          <table:table-cell table:style-name="ce13" table:formula="of:=AVERAGE([.E22:.E25];[.E27:.E29])" office:value-type="float" office:value="51.6269631428571" calcext:value-type="float">
            <text:p>51.6269631428571</text:p>
          </table:table-cell>
          <table:table-cell table:style-name="ce13" table:formula="of:=AVERAGE([.F22:.F25];[.F27:.F29])" office:value-type="float" office:value="1.929956" calcext:value-type="float">
            <text:p>1.929956</text:p>
          </table:table-cell>
          <table:table-cell table:style-name="ce13" table:formula="of:=AVERAGE([.G22:.G25];[.G27:.G29])" office:value-type="float" office:value="1.81773628571429" calcext:value-type="float">
            <text:p>1.81773628571429</text:p>
          </table:table-cell>
          <table:table-cell table:style-name="ce13" table:formula="of:=AVERAGE([.H22:.H25];[.H27:.H29])" office:value-type="float" office:value="0.472349142857143" calcext:value-type="float">
            <text:p>0.472349142857143</text:p>
          </table:table-cell>
          <table:table-cell table:style-name="ce13" table:formula="of:=AVERAGE([.I22:.I25];[.I27:.I29])" office:value-type="float" office:value="1.47721114285714" calcext:value-type="float">
            <text:p>1.47721114285714</text:p>
          </table:table-cell>
          <table:table-cell table:style-name="ce13" table:formula="of:=AVERAGE([.J22:.J25];[.J27:.J29])" office:value-type="float" office:value="2.25435657142857" calcext:value-type="float">
            <text:p>2.25435657142857</text:p>
          </table:table-cell>
          <table:table-cell table:style-name="ce13" table:formula="of:=AVERAGE([.K22:.K25];[.K27:.K29])" office:value-type="float" office:value="65.5714285714286" calcext:value-type="float">
            <text:p>65.5714285714286</text:p>
          </table:table-cell>
          <table:table-cell table:number-columns-repeated="2"/>
        </table:table-row>
      </table:table>
      <table:table table:name="data" table:style-name="ta1">
        <table:table-column table:style-name="co12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Good in around:</text:p>
          </table:table-cell>
          <table:table-cell office:value-type="string" calcext:value-type="string">
            <text:p>1, 3, 8, 9, 12, 16, 17, 23, 29, 30, 33, 35, 37, 39, 40, 43, 45, 46, 47, 49, 52, 55, 62, 66, 68, 69, 71, 72, 78, 80, 81, 82, </text:p>
          </table:table-cell>
        </table:table-row>
        <table:table-row table:style-name="ro3">
          <table:table-cell office:value-type="string" calcext:value-type="string">
            <text:p>Good in direct:</text:p>
          </table:table-cell>
          <table:table-cell office:value-type="string" calcext:value-type="string">
            <text:p>15, 36, 44, 60</text:p>
          </table:table-cell>
        </table:table-row>
        <table:table-row table:style-name="ro3">
          <table:table-cell office:value-type="string" calcext:value-type="string">
            <text:p>Good in all:</text:p>
          </table:table-cell>
          <table:table-cell office:value-type="string" calcext:value-type="string">
            <text:p>1, 3, 8, 9, 12, 15, 16, 17, 23, 29, 30, 33, 35, 36, 37, 39, 40, 43, 44, 45, 46, 47, 49, 52, 55, 60, 62, 66, 68, 69, 71, 72, 78, 80, 81, 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22:40:00.88517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7-13T05:01:59.056283799</meta:creation-date>
    <meta:generator>LibreOffice/6.4.7.2$Linux_X86_64 LibreOffice_project/40$Build-2</meta:generator>
    <dc:date>2026-07-21T01:54:55.027792667</dc:date>
    <meta:editing-duration>P1DT21H57M27S</meta:editing-duration>
    <meta:editing-cycles>77</meta:editing-cycles>
    <meta:document-statistic meta:table-count="2" meta:cell-count="266" meta:object-count="0"/>
  </office:meta>
</office:document-meta>
</file>