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0.521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57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in"/>
    </style:style>
    <style:style style:name="ce19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ext-properties style:font-name="Liberation Sans" fo:font-weight="normal" style:font-weight-asian="normal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1pt" fo:font-weight="normal" style:font-size-asian="11pt" style:font-weight-asian="normal" style:font-weight-complex="normal"/>
    </style:style>
    <style:style style:name="ce16" style:family="table-cell" style:parent-style-name="Default">
      <style:text-properties style:font-name="Liberation Sans" fo:font-size="11pt" fo:font-weight="normal" style:font-size-asian="11pt" style:font-weight-asian="normal" style:font-weight-complex="normal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fo:font-weight="normal" style:font-size-asian="11pt" style:font-weight-asian="normal" style:font-weight-complex="normal"/>
    </style:style>
    <style:style style:name="ce5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weight="normal" style:font-weight-asian="normal" style:font-weight-complex="normal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style:font-name="Liberation Sans"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" style:family="table-cell" style:parent-style-name="Default">
      <style:text-properties style:font-name="Liberation Sans"/>
    </style:style>
    <style:style style:name="ce59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weight="bold" style:font-weight-asian="bold" style:font-weight-complex="bold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T1" style:family="text">
      <style:text-properties style:use-window-font-color="true" style:font-name="Calibri" style:letter-kerning="false" fo:language="en" fo:country="US" style:language-asian="zh" style:country-asian="CN" style:font-size-asian="11pt"/>
    </style:style>
    <style:style style:name="T2" style:family="text">
      <style:text-properties style:use-window-font-color="true" style:font-name="Calibri" style:letter-kerning="false" fo:language="en" fo:country="US" style:font-size-asian="11pt" style:language-asian="ja" style:country-asian="JP"/>
    </style:style>
    <style:style style:name="T3" style:family="text">
      <style:text-properties style:use-window-font-color="true" style:font-name="Calibri" style:letter-kerning="false" fo:language="en" fo:country="US" style:font-size-asian="11pt" style:language-asian="zh" style:country-asian="CN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lter_angle_45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5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/>
          <table:table-cell table:style-name="ce4" office:value-type="string" calcext:value-type="string">
            <text:p>Planner</text:p>
          </table:table-cell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Path length </text:p>
            <text:p>(m)</text:p>
          </table:table-cell>
          <table:table-cell table:style-name="ce30" office:value-type="string" calcext:value-type="string">
            <text:p>Path irregularity </text:p>
            <text:p>(rad/m)</text:p>
          </table:table-cell>
          <table:table-cell table:style-name="ce30" office:value-type="string" calcext:value-type="string" table:number-columns-spanned="2" table:number-rows-spanned="1">
            <text:p>Closest-pedestrian distance </text:p>
            <text:p>(m) [mean, std]</text:p>
          </table:table-cell>
          <table:covered-table-cell table:style-name="ce30"/>
          <table:table-cell table:style-name="ce50" office:value-type="string" calcext:value-type="string" table:number-columns-spanned="3" table:number-rows-spanned="1">
            <text:p><text:span text:style-name="T1">Minimum </text:span><text:span text:style-name="T2">t</text:span><text:span text:style-name="T3">ime-to-collision </text:span></text:p>
            <text:p><text:span text:style-name="T4">(s) [mean, std, number of collision]</text:span></text:p>
          </table:table-cell>
          <table:covered-table-cell table:number-columns-repeated="2" table:style-name="ce50"/>
          <table:table-cell table:number-columns-repeated="2"/>
        </table:table-row>
        <table:table-row table:style-name="ro2">
          <table:table-cell table:style-name="ce8" office:value-type="string" calcext:value-type="string" table:number-columns-spanned="1" table:number-rows-spanned="5">
            <text:p>python3 dataset.py --k_horizon_frames 60 --d_thresh 2.5 --node_inclusion_radius 50 --normalize_node_features --normalize_labels --filter_angle 45</text:p>
          </table:table-cell>
          <table:table-cell/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corridor_1</text:p>
          </table:table-cell>
          <table:table-cell table:style-name="ce9" office:value-type="float" office:value="33.667135" calcext:value-type="float">
            <text:p>33.667135</text:p>
          </table:table-cell>
          <table:table-cell table:style-name="ce15" office:value-type="float" office:value="0.258155" calcext:value-type="float">
            <text:p>0.258155</text:p>
          </table:table-cell>
          <table:table-cell table:style-name="ce9" office:value-type="float" office:value="1.755129" calcext:value-type="float">
            <text:p>1.755129</text:p>
          </table:table-cell>
          <table:table-cell table:style-name="ce9" office:value-type="float" office:value="0.584737" calcext:value-type="float">
            <text:p>0.584737</text:p>
          </table:table-cell>
          <table:table-cell table:style-name="ce23" office:value-type="float" office:value="0.209661" calcext:value-type="float">
            <text:p>0.209661</text:p>
          </table:table-cell>
          <table:table-cell table:style-name="ce23" office:value-type="float" office:value="0.480102" calcext:value-type="float">
            <text:p>0.480102</text:p>
          </table:table-cell>
          <table:table-cell table:style-name="ce23" office:value-type="float" office:value="50" calcext:value-type="float">
            <text:p>50</text:p>
          </table:table-cell>
          <table:table-cell table:style-name="ce2" table:number-columns-repeated="2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corridor_2</text:p>
          </table:table-cell>
          <table:table-cell table:style-name="ce10" office:value-type="float" office:value="33.823849" calcext:value-type="float">
            <text:p>33.823849</text:p>
          </table:table-cell>
          <table:table-cell table:style-name="ce16" office:value-type="float" office:value="0.29906" calcext:value-type="float">
            <text:p>0.29906</text:p>
          </table:table-cell>
          <table:table-cell table:style-name="ce10" office:value-type="float" office:value="1.757353" calcext:value-type="float">
            <text:p>1.757353</text:p>
          </table:table-cell>
          <table:table-cell table:style-name="ce10" office:value-type="float" office:value="0.476256" calcext:value-type="float">
            <text:p>0.476256</text:p>
          </table:table-cell>
          <table:table-cell table:style-name="ce24" office:value-type="float" office:value="0.416398" calcext:value-type="float">
            <text:p>0.416398</text:p>
          </table:table-cell>
          <table:table-cell table:style-name="ce24" office:value-type="float" office:value="1.001143" calcext:value-type="float">
            <text:p>1.001143</text:p>
          </table:table-cell>
          <table:table-cell table:style-name="ce24" office:value-type="float" office:value="66" calcext:value-type="float">
            <text:p>66</text:p>
          </table:table-cell>
          <table:table-cell table:style-name="ce2" table:number-columns-repeated="2"/>
        </table:table-row>
        <table:table-row table:style-name="ro2">
          <table:covered-table-cell/>
          <table:table-cell office:value-type="string" calcext:value-type="string">
            <text:p>node_inclusion_radius</text:p>
          </table:table-cell>
          <table:table-cell/>
          <table:table-cell office:value-type="string" calcext:value-type="string">
            <text:p>hg_1</text:p>
          </table:table-cell>
          <table:table-cell table:style-name="ce10" office:value-type="float" office:value="32.6825" calcext:value-type="float">
            <text:p>32.6825</text:p>
          </table:table-cell>
          <table:table-cell table:style-name="ce16" office:value-type="float" office:value="0.600031" calcext:value-type="float">
            <text:p>0.600031</text:p>
          </table:table-cell>
          <table:table-cell table:style-name="ce10" office:value-type="float" office:value="1.827774" calcext:value-type="float">
            <text:p>1.827774</text:p>
          </table:table-cell>
          <table:table-cell table:style-name="ce10" office:value-type="float" office:value="0.537869" calcext:value-type="float">
            <text:p>0.537869</text:p>
          </table:table-cell>
          <table:table-cell table:style-name="ce24" office:value-type="float" office:value="1.630958" calcext:value-type="float">
            <text:p>1.630958</text:p>
          </table:table-cell>
          <table:table-cell table:style-name="ce24" office:value-type="float" office:value="3.696425" calcext:value-type="float">
            <text:p>3.696425</text:p>
          </table:table-cell>
          <table:table-cell table:style-name="ce24" office:value-type="float" office:value="71" calcext:value-type="float">
            <text:p>71</text:p>
          </table:table-cell>
          <table:table-cell table:style-name="ce2" table:number-columns-repeated="2"/>
        </table:table-row>
        <table:table-row table:style-name="ro2">
          <table:covered-table-cell/>
          <table:table-cell office:value-type="string" calcext:value-type="string">
            <text:p>other k_horizon_frames</text:p>
          </table:table-cell>
          <table:table-cell/>
          <table:table-cell office:value-type="string" calcext:value-type="string">
            <text:p>hg_2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24" table:number-columns-repeated="3"/>
          <table:table-cell table:style-name="ce2" table:number-columns-repeated="2"/>
        </table:table-row>
        <table:table-row table:style-name="ro2">
          <table:covered-table-cell/>
          <table:table-cell office:value-type="string" calcext:value-type="string">
            <text:p>other angle</text:p>
          </table:table-cell>
          <table:table-cell/>
          <table:table-cell office:value-type="string" calcext:value-type="string">
            <text:p>indoor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24" table:number-columns-repeated="3"/>
          <table:table-cell table:style-name="ce2"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amp_1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24" table:number-columns-repeated="3"/>
          <table:table-cell table:style-name="ce2" table:number-columns-repeated="2"/>
        </table:table-row>
        <table:table-row table:style-name="ro2">
          <table:table-cell table:style-name="ce1" office:value-type="string" calcext:value-type="string">
            <text:p>train</text:p>
          </table:table-cell>
          <table:table-cell table:number-columns-repeated="2"/>
          <table:table-cell office:value-type="string" calcext:value-type="string">
            <text:p>ramp_2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24" table:number-columns-repeated="3"/>
          <table:table-cell table:style-name="ce2" table:number-columns-repeated="2"/>
        </table:table-row>
        <table:table-row table:style-name="ro2">
          <table:table-cell table:style-name="ce48" office:value-type="string" calcext:value-type="string" table:number-columns-spanned="1" table:number-rows-spanned="12">
            <text:p>python3 train.py --batch_size 256 --epochs 60 --lr 5e-4 --weight_decay 1e-4 --hidden_dim 64 --filtered_files_json data/filtered_files.json --num_layers 1 --model SocialForceGNN --consistency_loss --lambda_cons 0.0 --dropout_p 0.1</text:p>
          </table:table-cell>
          <table:table-cell table:number-columns-repeated="2"/>
          <table:table-cell table:style-name="ce6" office:value-type="string" calcext:value-type="string">
            <text:p>stairs</text:p>
          </table:table-cell>
          <table:table-cell office:value-type="float" office:value="105.15039" calcext:value-type="float">
            <text:p>105.15039</text:p>
          </table:table-cell>
          <table:table-cell table:style-name="ce16" office:value-type="float" office:value="1.78795" calcext:value-type="float">
            <text:p>1.78795</text:p>
          </table:table-cell>
          <table:table-cell table:style-name="ce10" office:value-type="float" office:value="1.859127" calcext:value-type="float">
            <text:p>1.859127</text:p>
          </table:table-cell>
          <table:table-cell table:style-name="ce10" office:value-type="float" office:value="0.510704" calcext:value-type="float">
            <text:p>0.510704</text:p>
          </table:table-cell>
          <table:table-cell table:style-name="ce24" office:value-type="float" office:value="2.176531" calcext:value-type="float">
            <text:p>2.176531</text:p>
          </table:table-cell>
          <table:table-cell table:style-name="ce24" office:value-type="float" office:value="3.908519" calcext:value-type="float">
            <text:p>3.908519</text:p>
          </table:table-cell>
          <table:table-cell table:style-name="ce24" office:value-type="float" office:value="143" calcext:value-type="float">
            <text:p>143</text:p>
          </table:table-cell>
          <table:table-cell table:style-name="ce2" table:number-columns-repeated="2"/>
        </table:table-row>
        <table:table-row table:style-name="ro2">
          <table:covered-table-cell/>
          <table:table-cell/>
          <table:table-cell table:style-name="ce7"/>
          <table:table-cell table:style-name="ce7" office:value-type="string" calcext:value-type="string">
            <text:p>double</text:p>
          </table:table-cell>
          <table:table-cell table:style-name="ce11" office:value-type="float" office:value="58.950442" calcext:value-type="float">
            <text:p>58.950442</text:p>
          </table:table-cell>
          <table:table-cell table:style-name="ce17" office:value-type="float" office:value="7.252513" calcext:value-type="float">
            <text:p>7.252513</text:p>
          </table:table-cell>
          <table:table-cell table:style-name="ce11" office:value-type="float" office:value="1.556024" calcext:value-type="float">
            <text:p>1.556024</text:p>
          </table:table-cell>
          <table:table-cell table:style-name="ce11" office:value-type="float" office:value="0.491697" calcext:value-type="float">
            <text:p>0.491697</text:p>
          </table:table-cell>
          <table:table-cell table:style-name="ce25" office:value-type="float" office:value="0.418762" calcext:value-type="float">
            <text:p>0.418762</text:p>
          </table:table-cell>
          <table:table-cell table:style-name="ce25" office:value-type="float" office:value="1.124252" calcext:value-type="float">
            <text:p>1.124252</text:p>
          </table:table-cell>
          <table:table-cell table:style-name="ce25" office:value-type="float" office:value="527" calcext:value-type="float">
            <text:p>527</text:p>
          </table:table-cell>
          <table:table-cell table:style-name="ce2" table:number-columns-repeated="2"/>
        </table:table-row>
        <table:table-row table:style-name="ro3">
          <table:covered-table-cell/>
          <table:table-cell/>
          <table:table-cell table:style-name="ce7" table:number-columns-repeated="2"/>
          <table:table-cell table:style-name="ce11" table:formula="of:=AVERAGE([.E2:.E5];[.E7:.E10])" office:value-type="float" office:value="52.8548632" calcext:value-type="float">
            <text:p>52.8548632</text:p>
          </table:table-cell>
          <table:table-cell table:style-name="ce11" table:formula="of:=AVERAGE([.F2:.F5];[.F7:.F10])" office:value-type="float" office:value="2.0395418" calcext:value-type="float">
            <text:p>2.0395418</text:p>
          </table:table-cell>
          <table:table-cell table:style-name="ce11" table:formula="of:=AVERAGE([.G2:.G5];[.G7:.G10])" office:value-type="float" office:value="1.7510814" calcext:value-type="float">
            <text:p>1.7510814</text:p>
          </table:table-cell>
          <table:table-cell table:style-name="ce11" table:formula="of:=AVERAGE([.H2:.H5];[.H7:.H10])" office:value-type="float" office:value="0.5202526" calcext:value-type="float">
            <text:p>0.5202526</text:p>
          </table:table-cell>
          <table:table-cell table:style-name="ce11" table:formula="of:=AVERAGE([.I2:.I5];[.I7:.I10])" office:value-type="float" office:value="0.970462" calcext:value-type="float">
            <text:p>0.970462</text:p>
          </table:table-cell>
          <table:table-cell table:style-name="ce11" table:formula="of:=AVERAGE([.J2:.J5];[.J7:.J10])" office:value-type="float" office:value="2.0420882" calcext:value-type="float">
            <text:p>2.0420882</text:p>
          </table:table-cell>
          <table:table-cell table:style-name="ce11" table:formula="of:=AVERAGE([.K2:.K5];[.K7:.K10])" office:value-type="float" office:value="171.4" calcext:value-type="float">
            <text:p>171.4</text:p>
          </table:table-cell>
          <table:table-cell table:style-name="ce2" table:number-columns-repeated="2"/>
        </table:table-row>
        <table:table-row table:style-name="ro3">
          <table:covered-table-cell/>
          <table:table-cell/>
          <table:table-cell table:style-name="ce5" office:value-type="string" calcext:value-type="string">
            <text:p>GNN</text:p>
          </table:table-cell>
          <table:table-cell table:style-name="ce32" office:value-type="string" calcext:value-type="string">
            <text:p>corridor_1</text:p>
          </table:table-cell>
          <table:table-cell table:style-name="ce9" office:value-type="float" office:value="37.298062" calcext:value-type="float">
            <text:p>37.298062</text:p>
          </table:table-cell>
          <table:table-cell table:style-name="ce9" office:value-type="float" office:value="1.198586" calcext:value-type="float">
            <text:p>1.198586</text:p>
          </table:table-cell>
          <table:table-cell table:style-name="ce9" office:value-type="float" office:value="1.810342" calcext:value-type="float">
            <text:p>1.810342</text:p>
          </table:table-cell>
          <table:table-cell table:style-name="ce9" office:value-type="float" office:value="0.630112" calcext:value-type="float">
            <text:p>0.630112</text:p>
          </table:table-cell>
          <table:table-cell table:style-name="ce23" office:value-type="float" office:value="0.22397" calcext:value-type="float">
            <text:p>0.22397</text:p>
          </table:table-cell>
          <table:table-cell table:style-name="ce23" office:value-type="float" office:value="0.521277" calcext:value-type="float">
            <text:p>0.521277</text:p>
          </table:table-cell>
          <table:table-cell table:style-name="ce23" office:value-type="float" office:value="45" calcext:value-type="float">
            <text:p>45</text:p>
          </table:table-cell>
          <table:table-cell table:style-name="ce2"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corridor_2</text:p>
          </table:table-cell>
          <table:table-cell table:style-name="ce10" office:value-type="float" office:value="35.57548" calcext:value-type="float">
            <text:p>35.57548</text:p>
          </table:table-cell>
          <table:table-cell table:style-name="ce10" office:value-type="float" office:value="1.478411" calcext:value-type="float">
            <text:p>1.478411</text:p>
          </table:table-cell>
          <table:table-cell table:style-name="ce10" office:value-type="float" office:value="1.808322" calcext:value-type="float">
            <text:p>1.808322</text:p>
          </table:table-cell>
          <table:table-cell table:style-name="ce10" office:value-type="float" office:value="0.468624" calcext:value-type="float">
            <text:p>0.468624</text:p>
          </table:table-cell>
          <table:table-cell table:style-name="ce24" office:value-type="float" office:value="0.573244" calcext:value-type="float">
            <text:p>0.573244</text:p>
          </table:table-cell>
          <table:table-cell table:style-name="ce24" office:value-type="float" office:value="0.98741" calcext:value-type="float">
            <text:p>0.98741</text:p>
          </table:table-cell>
          <table:table-cell table:style-name="ce24" office:value-type="float" office:value="59" calcext:value-type="float">
            <text:p>59</text:p>
          </table:table-cell>
          <table:table-cell table:style-name="ce2"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hg_1</text:p>
          </table:table-cell>
          <table:table-cell office:value-type="float" office:value="34.298213" calcext:value-type="float">
            <text:p>34.298213</text:p>
          </table:table-cell>
          <table:table-cell office:value-type="float" office:value="1.493448" calcext:value-type="float">
            <text:p>1.493448</text:p>
          </table:table-cell>
          <table:table-cell office:value-type="float" office:value="1.837825" calcext:value-type="float">
            <text:p>1.837825</text:p>
          </table:table-cell>
          <table:table-cell office:value-type="float" office:value="0.53427" calcext:value-type="float">
            <text:p>0.53427</text:p>
          </table:table-cell>
          <table:table-cell office:value-type="float" office:value="1.723816" calcext:value-type="float">
            <text:p>1.723816</text:p>
          </table:table-cell>
          <table:table-cell office:value-type="float" office:value="3.742724" calcext:value-type="float">
            <text:p>3.74272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hg_2</text:p>
          </table:table-cell>
          <table:table-cell table:number-columns-repeated="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indoor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24" table:number-columns-repeated="3"/>
          <table:table-cell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ramp_1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ramp_2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stairs</text:p>
          </table:table-cell>
          <table:table-cell office:value-type="float" office:value="108.508948" calcext:value-type="float">
            <text:p>108.508948</text:p>
          </table:table-cell>
          <table:table-cell office:value-type="float" office:value="1.960122" calcext:value-type="float">
            <text:p>1.960122</text:p>
          </table:table-cell>
          <table:table-cell office:value-type="float" office:value="1.885424" calcext:value-type="float">
            <text:p>1.885424</text:p>
          </table:table-cell>
          <table:table-cell office:value-type="float" office:value="0.506243" calcext:value-type="float">
            <text:p>0.506243</text:p>
          </table:table-cell>
          <table:table-cell office:value-type="float" office:value="2.398025" calcext:value-type="float">
            <text:p>2.398025</text:p>
          </table:table-cell>
          <table:table-cell office:value-type="float" office:value="4.411569" calcext:value-type="float">
            <text:p>4.411569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3">
          <table:covered-table-cell table:style-name="ce19"/>
          <table:table-cell office:value-type="string" calcext:value-type="string">
            <text:p>add attention mechanisms</text:p>
          </table:table-cell>
          <table:table-cell table:style-name="ce7"/>
          <table:table-cell table:style-name="ce33" office:value-type="string" calcext:value-type="string">
            <text:p>double</text:p>
          </table:table-cell>
          <table:table-cell table:style-name="ce13" office:value-type="float" office:value="63.095139" calcext:value-type="float">
            <text:p>63.095139</text:p>
          </table:table-cell>
          <table:table-cell table:style-name="ce13" office:value-type="float" office:value="5.59728" calcext:value-type="float">
            <text:p>5.59728</text:p>
          </table:table-cell>
          <table:table-cell table:style-name="ce13" office:value-type="float" office:value="1.5714" calcext:value-type="float">
            <text:p>1.5714</text:p>
          </table:table-cell>
          <table:table-cell table:style-name="ce13" office:value-type="float" office:value="0.494168" calcext:value-type="float">
            <text:p>0.494168</text:p>
          </table:table-cell>
          <table:table-cell table:style-name="ce27" office:value-type="float" office:value="0.434247" calcext:value-type="float">
            <text:p>0.434247</text:p>
          </table:table-cell>
          <table:table-cell table:style-name="ce27" office:value-type="float" office:value="1.14089" calcext:value-type="float">
            <text:p>1.14089</text:p>
          </table:table-cell>
          <table:table-cell table:style-name="ce27" office:value-type="float" office:value="510" calcext:value-type="float">
            <text:p>510</text:p>
          </table:table-cell>
          <table:table-cell table:number-columns-repeated="2"/>
        </table:table-row>
        <table:table-row table:style-name="ro3">
          <table:table-cell table:style-name="ce19"/>
          <table:table-cell/>
          <table:table-cell table:style-name="ce7"/>
          <table:table-cell table:style-name="ce61"/>
          <table:table-cell table:style-name="ce13" table:formula="of:=AVERAGE([.E12:.E15];[.E17:.E20])" office:value-type="float" office:value="55.7551684" calcext:value-type="float">
            <text:p>55.7551684</text:p>
          </table:table-cell>
          <table:table-cell table:style-name="ce13" table:formula="of:=AVERAGE([.F12:.F15];[.F17:.F20])" office:value-type="float" office:value="2.3455694" calcext:value-type="float">
            <text:p>2.3455694</text:p>
          </table:table-cell>
          <table:table-cell table:style-name="ce13" table:formula="of:=AVERAGE([.G12:.G15];[.G17:.G20])" office:value-type="float" office:value="1.7826626" calcext:value-type="float">
            <text:p>1.7826626</text:p>
          </table:table-cell>
          <table:table-cell table:style-name="ce13" table:formula="of:=AVERAGE([.H12:.H15];[.H17:.H20])" office:value-type="float" office:value="0.5266834" calcext:value-type="float">
            <text:p>0.5266834</text:p>
          </table:table-cell>
          <table:table-cell table:style-name="ce13" table:formula="of:=AVERAGE([.I12:.I15];[.I17:.I20])" office:value-type="float" office:value="1.0706604" calcext:value-type="float">
            <text:p>1.0706604</text:p>
          </table:table-cell>
          <table:table-cell table:style-name="ce13" table:formula="of:=AVERAGE([.J12:.J15];[.J17:.J20])" office:value-type="float" office:value="2.160774" calcext:value-type="float">
            <text:p>2.160774</text:p>
          </table:table-cell>
          <table:table-cell table:style-name="ce13" table:formula="of:=AVERAGE([.K12:.K15];[.K17:.K20])" office:value-type="float" office:value="162.8" calcext:value-type="float">
            <text:p>162.8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" office:value-type="string" calcext:value-type="string">
            <text:p>SFM</text:p>
          </table:table-cell>
          <table:table-cell table:style-name="ce5" office:value-type="string" calcext:value-type="string">
            <text:p>corridor_1</text:p>
          </table:table-cell>
          <table:table-cell table:style-name="ce14" office:value-type="float" office:value="35.437124" calcext:value-type="float">
            <text:p>35.437124</text:p>
          </table:table-cell>
          <table:table-cell table:style-name="ce14" office:value-type="float" office:value="0.93218" calcext:value-type="float">
            <text:p>0.93218</text:p>
          </table:table-cell>
          <table:table-cell table:style-name="ce14" office:value-type="float" office:value="1.790345" calcext:value-type="float">
            <text:p>1.790345</text:p>
          </table:table-cell>
          <table:table-cell table:style-name="ce14" office:value-type="float" office:value="0.550139" calcext:value-type="float">
            <text:p>0.550139</text:p>
          </table:table-cell>
          <table:table-cell table:style-name="ce28" office:value-type="float" office:value="0.223729" calcext:value-type="float">
            <text:p>0.223729</text:p>
          </table:table-cell>
          <table:table-cell table:style-name="ce28" office:value-type="float" office:value="0.508509" calcext:value-type="float">
            <text:p>0.508509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track</text:p>
          </table:table-cell>
          <table:table-cell office:value-type="string" calcext:value-type="string">
            <text:p>kalman filter params</text:p>
          </table:table-cell>
          <table:table-cell/>
          <table:table-cell table:style-name="ce6" office:value-type="string" calcext:value-type="string">
            <text:p>corridor_2</text:p>
          </table:table-cell>
          <table:table-cell office:value-type="float" office:value="35.611165" calcext:value-type="float">
            <text:p>35.611165</text:p>
          </table:table-cell>
          <table:table-cell office:value-type="float" office:value="1.601167" calcext:value-type="float">
            <text:p>1.601167</text:p>
          </table:table-cell>
          <table:table-cell office:value-type="float" office:value="1.784677" calcext:value-type="float">
            <text:p>1.784677</text:p>
          </table:table-cell>
          <table:table-cell office:value-type="float" office:value="0.456822" calcext:value-type="float">
            <text:p>0.456822</text:p>
          </table:table-cell>
          <table:table-cell office:value-type="float" office:value="0.644273" calcext:value-type="float">
            <text:p>0.644273</text:p>
          </table:table-cell>
          <table:table-cell office:value-type="float" office:value="1.267006" calcext:value-type="float">
            <text:p>1.267006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3">
          <table:table-cell table:style-name="ce8" office:value-type="string" calcext:value-type="string" table:number-columns-spanned="1" table:number-rows-spanned="3">
            <text:p>python3 offset_plot_ekf.py --visualize --min-sensor-distance 2.5 --max-pedestrians 1</text:p>
          </table:table-cell>
          <table:table-cell table:number-columns-repeated="2"/>
          <table:table-cell table:style-name="ce6" office:value-type="string" calcext:value-type="string">
            <text:p>hg_1</text:p>
          </table:table-cell>
          <table:table-cell office:value-type="float" office:value="39.812114" calcext:value-type="float">
            <text:p>39.812114</text:p>
          </table:table-cell>
          <table:table-cell office:value-type="float" office:value="2.802909" calcext:value-type="float">
            <text:p>2.802909</text:p>
          </table:table-cell>
          <table:table-cell office:value-type="float" office:value="1.869381" calcext:value-type="float">
            <text:p>1.869381</text:p>
          </table:table-cell>
          <table:table-cell office:value-type="float" office:value="0.503114" calcext:value-type="float">
            <text:p>0.503114</text:p>
          </table:table-cell>
          <table:table-cell office:value-type="float" office:value="1.498266" calcext:value-type="float">
            <text:p>1.498266</text:p>
          </table:table-cell>
          <table:table-cell office:value-type="float" office:value="3.372115" calcext:value-type="float">
            <text:p>3.372115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3">
          <table:covered-table-cell/>
          <table:table-cell table:number-columns-repeated="2"/>
          <table:table-cell table:style-name="ce6" office:value-type="string" calcext:value-type="string">
            <text:p>hg_2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style-name="ce6" office:value-type="string" calcext:value-type="string">
            <text:p>indoor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6" office:value-type="string" calcext:value-type="string">
            <text:p>ramp_1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eval</text:p>
          </table:table-cell>
          <table:table-cell table:number-columns-repeated="2"/>
          <table:table-cell table:style-name="ce6" office:value-type="string" calcext:value-type="string">
            <text:p>ramp_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ython3 evaluate.py --collision-radius 1.2</text:p>
          </table:table-cell>
          <table:table-cell table:number-columns-repeated="2"/>
          <table:table-cell table:style-name="ce6" office:value-type="string" calcext:value-type="string">
            <text:p>stairs</text:p>
          </table:table-cell>
          <table:table-cell office:value-type="float" office:value="116.866118" calcext:value-type="float">
            <text:p>116.866118</text:p>
          </table:table-cell>
          <table:table-cell office:value-type="float" office:value="3.398501" calcext:value-type="float">
            <text:p>3.398501</text:p>
          </table:table-cell>
          <table:table-cell office:value-type="float" office:value="1.892675" calcext:value-type="float">
            <text:p>1.892675</text:p>
          </table:table-cell>
          <table:table-cell office:value-type="float" office:value="0.477724" calcext:value-type="float">
            <text:p>0.477724</text:p>
          </table:table-cell>
          <table:table-cell office:value-type="float" office:value="2.461297" calcext:value-type="float">
            <text:p>2.461297</text:p>
          </table:table-cell>
          <table:table-cell office:value-type="float" office:value="4.280976" calcext:value-type="float">
            <text:p>4.280976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7"/>
          <table:table-cell table:style-name="ce7" office:value-type="string" calcext:value-type="string">
            <text:p>double</text:p>
          </table:table-cell>
          <table:table-cell table:style-name="ce13" office:value-type="float" office:value="66.542238" calcext:value-type="float">
            <text:p>66.542238</text:p>
          </table:table-cell>
          <table:table-cell table:style-name="ce13" office:value-type="float" office:value="9.979256" calcext:value-type="float">
            <text:p>9.979256</text:p>
          </table:table-cell>
          <table:table-cell table:style-name="ce13" office:value-type="float" office:value="1.604595" calcext:value-type="float">
            <text:p>1.604595</text:p>
          </table:table-cell>
          <table:table-cell table:style-name="ce13" office:value-type="float" office:value="0.476104" calcext:value-type="float">
            <text:p>0.476104</text:p>
          </table:table-cell>
          <table:table-cell table:style-name="ce27" office:value-type="float" office:value="0.544487" calcext:value-type="float">
            <text:p>0.544487</text:p>
          </table:table-cell>
          <table:table-cell table:style-name="ce27" office:value-type="float" office:value="1.224437" calcext:value-type="float">
            <text:p>1.224437</text:p>
          </table:table-cell>
          <table:table-cell table:style-name="ce27" office:value-type="float" office:value="486" calcext:value-type="float">
            <text:p>48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ax-sensor-distance</text:p>
          </table:table-cell>
          <table:table-cell table:style-name="ce7" table:number-columns-repeated="2"/>
          <table:table-cell table:style-name="ce13" table:formula="of:=AVERAGE([.E22:.E25];[.E27:.E30])" office:value-type="float" office:value="58.8537518" calcext:value-type="float">
            <text:p>58.8537518</text:p>
          </table:table-cell>
          <table:table-cell table:style-name="ce13" table:formula="of:=AVERAGE([.F22:.F25];[.F27:.F30])" office:value-type="float" office:value="3.7428026" calcext:value-type="float">
            <text:p>3.7428026</text:p>
          </table:table-cell>
          <table:table-cell table:style-name="ce13" table:formula="of:=AVERAGE([.G22:.G25];[.G27:.G30])" office:value-type="float" office:value="1.7883346" calcext:value-type="float">
            <text:p>1.7883346</text:p>
          </table:table-cell>
          <table:table-cell table:style-name="ce13" table:formula="of:=AVERAGE([.H22:.H25];[.H27:.H30])" office:value-type="float" office:value="0.4927806" calcext:value-type="float">
            <text:p>0.4927806</text:p>
          </table:table-cell>
          <table:table-cell table:style-name="ce13" table:formula="of:=AVERAGE([.I22:.I25];[.I27:.I30])" office:value-type="float" office:value="1.0744104" calcext:value-type="float">
            <text:p>1.0744104</text:p>
          </table:table-cell>
          <table:table-cell table:style-name="ce13" table:formula="of:=AVERAGE([.J22:.J25];[.J27:.J30])" office:value-type="float" office:value="2.1306086" calcext:value-type="float">
            <text:p>2.1306086</text:p>
          </table:table-cell>
          <table:table-cell table:style-name="ce13" table:formula="of:=AVERAGE([.K22:.K25];[.K27:.K30])" office:value-type="float" office:value="158.2" calcext:value-type="float">
            <text:p>158.2</text:p>
          </table:table-cell>
          <table:table-cell table:number-columns-repeated="2"/>
        </table:table-row>
      </table:table>
      <table:table table:name="filter_angle_4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5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/>
          <table:table-cell table:style-name="ce4" office:value-type="string" calcext:value-type="string">
            <text:p>Planner</text:p>
          </table:table-cell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Path length </text:p>
            <text:p>(m)</text:p>
          </table:table-cell>
          <table:table-cell table:style-name="ce30" office:value-type="string" calcext:value-type="string">
            <text:p>Path irregularity </text:p>
            <text:p>(rad/m)</text:p>
          </table:table-cell>
          <table:table-cell table:style-name="ce30" office:value-type="string" calcext:value-type="string" table:number-columns-spanned="2" table:number-rows-spanned="1">
            <text:p>Closest-pedestrian distance </text:p>
            <text:p>(m) [mean, std]</text:p>
          </table:table-cell>
          <table:covered-table-cell table:style-name="ce30"/>
          <table:table-cell table:style-name="ce50" office:value-type="string" calcext:value-type="string" table:number-columns-spanned="3" table:number-rows-spanned="1">
            <text:p><text:span text:style-name="T1">Minimum </text:span><text:span text:style-name="T2">t</text:span><text:span text:style-name="T3">ime-to-collision </text:span></text:p>
            <text:p><text:span text:style-name="T4">(s) [mean, std, number of collision]</text:span></text:p>
          </table:table-cell>
          <table:covered-table-cell table:number-columns-repeated="2" table:style-name="ce50"/>
          <table:table-cell table:number-columns-repeated="2"/>
        </table:table-row>
        <table:table-row table:style-name="ro2">
          <table:table-cell table:style-name="ce8" office:value-type="string" calcext:value-type="string" table:number-columns-spanned="1" table:number-rows-spanned="5">
            <text:p>python3 dataset.py --k_horizon_frames 60 --d_thresh 2.5 --node_inclusion_radius 50 --normalize_node_features --normalize_labels --filter_angle 45</text:p>
          </table:table-cell>
          <table:table-cell/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corridor_1</text:p>
          </table:table-cell>
          <table:table-cell table:style-name="ce9" office:value-type="float" office:value="33.668118" calcext:value-type="float">
            <text:p>33.668118</text:p>
          </table:table-cell>
          <table:table-cell table:style-name="ce15" office:value-type="float" office:value="0.261557" calcext:value-type="float">
            <text:p>0.261557</text:p>
          </table:table-cell>
          <table:table-cell table:style-name="ce9" office:value-type="float" office:value="1.681967" calcext:value-type="float">
            <text:p>1.681967</text:p>
          </table:table-cell>
          <table:table-cell table:style-name="ce9" office:value-type="float" office:value="0.608194" calcext:value-type="float">
            <text:p>0.608194</text:p>
          </table:table-cell>
          <table:table-cell table:style-name="ce23" office:value-type="float" office:value="0.189296" calcext:value-type="float">
            <text:p>0.189296</text:p>
          </table:table-cell>
          <table:table-cell table:style-name="ce23" office:value-type="float" office:value="0.440694" calcext:value-type="float">
            <text:p>0.440694</text:p>
          </table:table-cell>
          <table:table-cell table:style-name="ce23" office:value-type="float" office:value="65" calcext:value-type="float">
            <text:p>65</text:p>
          </table:table-cell>
          <table:table-cell table:style-name="ce2" table:number-columns-repeated="2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corridor_2</text:p>
          </table:table-cell>
          <table:table-cell table:style-name="ce10" office:value-type="float" office:value="33.821171" calcext:value-type="float">
            <text:p>33.821171</text:p>
          </table:table-cell>
          <table:table-cell table:style-name="ce16" office:value-type="float" office:value="0.293578" calcext:value-type="float">
            <text:p>0.293578</text:p>
          </table:table-cell>
          <table:table-cell table:style-name="ce10" office:value-type="float" office:value="1.753301" calcext:value-type="float">
            <text:p>1.753301</text:p>
          </table:table-cell>
          <table:table-cell table:style-name="ce10" office:value-type="float" office:value="0.486764" calcext:value-type="float">
            <text:p>0.486764</text:p>
          </table:table-cell>
          <table:table-cell table:style-name="ce24" office:value-type="float" office:value="0.464243" calcext:value-type="float">
            <text:p>0.464243</text:p>
          </table:table-cell>
          <table:table-cell table:style-name="ce24" office:value-type="float" office:value="0.018731" calcext:value-type="float">
            <text:p>0.018731</text:p>
          </table:table-cell>
          <table:table-cell table:style-name="ce24" office:value-type="float" office:value="69" calcext:value-type="float">
            <text:p>69</text:p>
          </table:table-cell>
          <table:table-cell table:style-name="ce2" table:number-columns-repeated="2"/>
        </table:table-row>
        <table:table-row table:style-name="ro2">
          <table:covered-table-cell/>
          <table:table-cell office:value-type="string" calcext:value-type="string">
            <text:p>node_inclusion_radius</text:p>
          </table:table-cell>
          <table:table-cell/>
          <table:table-cell office:value-type="string" calcext:value-type="string">
            <text:p>hg_1</text:p>
          </table:table-cell>
          <table:table-cell table:style-name="ce10" office:value-type="float" office:value="32.676968" calcext:value-type="float">
            <text:p>32.676968</text:p>
          </table:table-cell>
          <table:table-cell table:style-name="ce16" office:value-type="float" office:value="0.606449" calcext:value-type="float">
            <text:p>0.606449</text:p>
          </table:table-cell>
          <table:table-cell table:style-name="ce10" office:value-type="float" office:value="1.819331" calcext:value-type="float">
            <text:p>1.819331</text:p>
          </table:table-cell>
          <table:table-cell table:style-name="ce10" office:value-type="float" office:value="0.54531" calcext:value-type="float">
            <text:p>0.54531</text:p>
          </table:table-cell>
          <table:table-cell table:style-name="ce24" office:value-type="float" office:value="1.675695" calcext:value-type="float">
            <text:p>1.675695</text:p>
          </table:table-cell>
          <table:table-cell table:style-name="ce24" office:value-type="float" office:value="3.737351" calcext:value-type="float">
            <text:p>3.737351</text:p>
          </table:table-cell>
          <table:table-cell table:style-name="ce24" office:value-type="float" office:value="73" calcext:value-type="float">
            <text:p>73</text:p>
          </table:table-cell>
          <table:table-cell table:style-name="ce2" table:number-columns-repeated="2"/>
        </table:table-row>
        <table:table-row table:style-name="ro2">
          <table:covered-table-cell/>
          <table:table-cell office:value-type="string" calcext:value-type="string">
            <text:p>other k_horizon_frames</text:p>
          </table:table-cell>
          <table:table-cell/>
          <table:table-cell office:value-type="string" calcext:value-type="string">
            <text:p>hg_2</text:p>
          </table:table-cell>
          <table:table-cell table:style-name="ce10" office:value-type="float" office:value="34.613213" calcext:value-type="float">
            <text:p>34.613213</text:p>
          </table:table-cell>
          <table:table-cell table:style-name="ce16" office:value-type="float" office:value="0.470236" calcext:value-type="float">
            <text:p>0.470236</text:p>
          </table:table-cell>
          <table:table-cell table:style-name="ce10" office:value-type="float" office:value="2.062155" calcext:value-type="float">
            <text:p>2.062155</text:p>
          </table:table-cell>
          <table:table-cell table:style-name="ce10" office:value-type="float" office:value="0.382998" calcext:value-type="float">
            <text:p>0.382998</text:p>
          </table:table-cell>
          <table:table-cell table:style-name="ce24" office:value-type="float" office:value="3.83069" calcext:value-type="float">
            <text:p>3.83069</text:p>
          </table:table-cell>
          <table:table-cell table:style-name="ce24" office:value-type="float" office:value="4.171971" calcext:value-type="float">
            <text:p>4.171971</text:p>
          </table:table-cell>
          <table:table-cell table:style-name="ce24" office:value-type="float" office:value="13" calcext:value-type="float">
            <text:p>13</text:p>
          </table:table-cell>
          <table:table-cell table:style-name="ce2" table:number-columns-repeated="2"/>
        </table:table-row>
        <table:table-row table:style-name="ro2">
          <table:covered-table-cell/>
          <table:table-cell office:value-type="string" calcext:value-type="string">
            <text:p>other angle</text:p>
          </table:table-cell>
          <table:table-cell/>
          <table:table-cell office:value-type="string" calcext:value-type="string">
            <text:p>indoor</text:p>
          </table:table-cell>
          <table:table-cell table:style-name="ce10" office:value-type="float" office:value="3.073521" calcext:value-type="float">
            <text:p>3.073521</text:p>
          </table:table-cell>
          <table:table-cell table:style-name="ce16" office:value-type="float" office:value="9.326343" calcext:value-type="float">
            <text:p>9.326343</text:p>
          </table:table-cell>
          <table:table-cell table:style-name="ce10" office:value-type="float" office:value="2.208152" calcext:value-type="float">
            <text:p>2.208152</text:p>
          </table:table-cell>
          <table:table-cell table:style-name="ce10" office:value-type="float" office:value="0.164628" calcext:value-type="float">
            <text:p>0.164628</text:p>
          </table:table-cell>
          <table:table-cell table:style-name="ce24" office:value-type="float" office:value="5.957087" calcext:value-type="float">
            <text:p>5.957087</text:p>
          </table:table-cell>
          <table:table-cell table:style-name="ce24" office:value-type="float" office:value="2.946084" calcext:value-type="float">
            <text:p>2.946084</text:p>
          </table:table-cell>
          <table:table-cell table:style-name="ce24" office:value-type="float" office:value="4" calcext:value-type="float">
            <text:p>4</text:p>
          </table:table-cell>
          <table:table-cell table:style-name="ce2"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amp_1</text:p>
          </table:table-cell>
          <table:table-cell table:style-name="ce10" office:value-type="float" office:value="51.892632" calcext:value-type="float">
            <text:p>51.892632</text:p>
          </table:table-cell>
          <table:table-cell table:style-name="ce16" office:value-type="float" office:value="0.218195" calcext:value-type="float">
            <text:p>0.218195</text:p>
          </table:table-cell>
          <table:table-cell table:style-name="ce10" office:value-type="float" office:value="1.714876" calcext:value-type="float">
            <text:p>1.714876</text:p>
          </table:table-cell>
          <table:table-cell table:style-name="ce10" office:value-type="float" office:value="0.437352" calcext:value-type="float">
            <text:p>0.437352</text:p>
          </table:table-cell>
          <table:table-cell table:style-name="ce24" office:value-type="float" office:value="0.269784" calcext:value-type="float">
            <text:p>0.269784</text:p>
          </table:table-cell>
          <table:table-cell table:style-name="ce24" office:value-type="float" office:value="0.408002" calcext:value-type="float">
            <text:p>0.408002</text:p>
          </table:table-cell>
          <table:table-cell table:style-name="ce24" office:value-type="float" office:value="41" calcext:value-type="float">
            <text:p>41</text:p>
          </table:table-cell>
          <table:table-cell table:style-name="ce2" table:number-columns-repeated="2"/>
        </table:table-row>
        <table:table-row table:style-name="ro2">
          <table:table-cell table:style-name="ce1" office:value-type="string" calcext:value-type="string">
            <text:p>train</text:p>
          </table:table-cell>
          <table:table-cell table:number-columns-repeated="2"/>
          <table:table-cell office:value-type="string" calcext:value-type="string">
            <text:p>ramp_2</text:p>
          </table:table-cell>
          <table:table-cell table:style-name="ce10" office:value-type="float" office:value="31.947905" calcext:value-type="float">
            <text:p>31.947905</text:p>
          </table:table-cell>
          <table:table-cell table:style-name="ce16" office:value-type="float" office:value="0.240815" calcext:value-type="float">
            <text:p>0.240815</text:p>
          </table:table-cell>
          <table:table-cell table:style-name="ce10" office:value-type="float" office:value="1.591896" calcext:value-type="float">
            <text:p>1.591896</text:p>
          </table:table-cell>
          <table:table-cell table:style-name="ce10" office:value-type="float" office:value="0.479642" calcext:value-type="float">
            <text:p>0.479642</text:p>
          </table:table-cell>
          <table:table-cell table:style-name="ce24" office:value-type="float" office:value="0.375424" calcext:value-type="float">
            <text:p>0.375424</text:p>
          </table:table-cell>
          <table:table-cell table:style-name="ce24" office:value-type="float" office:value="0.647217" calcext:value-type="float">
            <text:p>0.647217</text:p>
          </table:table-cell>
          <table:table-cell table:style-name="ce24" office:value-type="float" office:value="93" calcext:value-type="float">
            <text:p>93</text:p>
          </table:table-cell>
          <table:table-cell table:style-name="ce2" table:number-columns-repeated="2"/>
        </table:table-row>
        <table:table-row table:style-name="ro2">
          <table:table-cell table:style-name="ce48" office:value-type="string" calcext:value-type="string" table:number-columns-spanned="1" table:number-rows-spanned="12">
            <text:p>python3 train.py --batch_size 256 --epochs 60 --lr 5e-4 --weight_decay 1e-4 --hidden_dim 64 --filtered_files_json data/filtered_files.json --num_layers 1 --model SocialForceGNN --consistency_loss --lambda_cons 0.0 --dropout_p 0.1</text:p>
          </table:table-cell>
          <table:table-cell table:number-columns-repeated="2"/>
          <table:table-cell table:style-name="ce6" office:value-type="string" calcext:value-type="string">
            <text:p>stairs</text:p>
          </table:table-cell>
          <table:table-cell office:value-type="float" office:value="105.145955" calcext:value-type="float">
            <text:p>105.145955</text:p>
          </table:table-cell>
          <table:table-cell table:style-name="ce16" office:value-type="float" office:value="1.786608" calcext:value-type="float">
            <text:p>1.786608</text:p>
          </table:table-cell>
          <table:table-cell table:style-name="ce10" office:value-type="float" office:value="1.847872" calcext:value-type="float">
            <text:p>1.847872</text:p>
          </table:table-cell>
          <table:table-cell table:style-name="ce10" office:value-type="float" office:value="0.517463" calcext:value-type="float">
            <text:p>0.517463</text:p>
          </table:table-cell>
          <table:table-cell table:style-name="ce24" office:value-type="float" office:value="2.16889" calcext:value-type="float">
            <text:p>2.16889</text:p>
          </table:table-cell>
          <table:table-cell table:style-name="ce24" office:value-type="float" office:value="3.982571" calcext:value-type="float">
            <text:p>3.982571</text:p>
          </table:table-cell>
          <table:table-cell table:style-name="ce24" office:value-type="float" office:value="145" calcext:value-type="float">
            <text:p>145</text:p>
          </table:table-cell>
          <table:table-cell table:style-name="ce2" table:number-columns-repeated="2"/>
        </table:table-row>
        <table:table-row table:style-name="ro2">
          <table:covered-table-cell/>
          <table:table-cell/>
          <table:table-cell table:style-name="ce7"/>
          <table:table-cell table:style-name="ce7" office:value-type="string" calcext:value-type="string">
            <text:p>double</text:p>
          </table:table-cell>
          <table:table-cell table:style-name="ce11" office:value-type="float" office:value="58.956859" calcext:value-type="float">
            <text:p>58.956859</text:p>
          </table:table-cell>
          <table:table-cell table:style-name="ce17" office:value-type="float" office:value="7.22425" calcext:value-type="float">
            <text:p>7.22425</text:p>
          </table:table-cell>
          <table:table-cell table:style-name="ce11" office:value-type="float" office:value="1.556608" calcext:value-type="float">
            <text:p>1.556608</text:p>
          </table:table-cell>
          <table:table-cell table:style-name="ce11" office:value-type="float" office:value="0.490656" calcext:value-type="float">
            <text:p>0.490656</text:p>
          </table:table-cell>
          <table:table-cell table:style-name="ce25" office:value-type="float" office:value="0.439293" calcext:value-type="float">
            <text:p>0.439293</text:p>
          </table:table-cell>
          <table:table-cell table:style-name="ce25" office:value-type="float" office:value="1.169682" calcext:value-type="float">
            <text:p>1.169682</text:p>
          </table:table-cell>
          <table:table-cell table:style-name="ce25" office:value-type="float" office:value="535" calcext:value-type="float">
            <text:p>535</text:p>
          </table:table-cell>
          <table:table-cell table:style-name="ce2" table:number-columns-repeated="2"/>
        </table:table-row>
        <table:table-row table:style-name="ro3">
          <table:covered-table-cell/>
          <table:table-cell/>
          <table:table-cell table:style-name="ce7" table:number-columns-repeated="2"/>
          <table:table-cell table:style-name="ce11" table:formula="of:=AVERAGE([.E2:.E5];[.E7:.E10])" office:value-type="float" office:value="47.840352625" calcext:value-type="float">
            <text:p>47.840352625</text:p>
          </table:table-cell>
          <table:table-cell table:style-name="ce11" table:formula="of:=AVERAGE([.F2:.F5];[.F7:.F10])" office:value-type="float" office:value="1.387711" calcext:value-type="float">
            <text:p>1.387711</text:p>
          </table:table-cell>
          <table:table-cell table:style-name="ce11" table:formula="of:=AVERAGE([.G2:.G5];[.G7:.G10])" office:value-type="float" office:value="1.75350075" calcext:value-type="float">
            <text:p>1.75350075</text:p>
          </table:table-cell>
          <table:table-cell table:style-name="ce11" table:formula="of:=AVERAGE([.H2:.H5];[.H7:.H10])" office:value-type="float" office:value="0.493547375" calcext:value-type="float">
            <text:p>0.493547375</text:p>
          </table:table-cell>
          <table:table-cell table:style-name="ce11" table:formula="of:=AVERAGE([.I2:.I5];[.I7:.I10])" office:value-type="float" office:value="1.176664375" calcext:value-type="float">
            <text:p>1.176664375</text:p>
          </table:table-cell>
          <table:table-cell table:style-name="ce11" table:formula="of:=AVERAGE([.J2:.J5];[.J7:.J10])" office:value-type="float" office:value="1.822027375" calcext:value-type="float">
            <text:p>1.822027375</text:p>
          </table:table-cell>
          <table:table-cell table:style-name="ce11" table:formula="of:=AVERAGE([.K2:.K5];[.K7:.K10])" office:value-type="float" office:value="129.25" calcext:value-type="float">
            <text:p>129.25</text:p>
          </table:table-cell>
          <table:table-cell table:style-name="ce2" table:number-columns-repeated="2"/>
        </table:table-row>
        <table:table-row table:style-name="ro3">
          <table:covered-table-cell/>
          <table:table-cell/>
          <table:table-cell table:style-name="ce5" office:value-type="string" calcext:value-type="string">
            <text:p>GNN</text:p>
          </table:table-cell>
          <table:table-cell table:style-name="ce32" office:value-type="string" calcext:value-type="string">
            <text:p>corridor_1</text:p>
          </table:table-cell>
          <table:table-cell table:style-name="ce9" office:value-type="float" office:value="35.423125" calcext:value-type="float">
            <text:p>35.423125</text:p>
          </table:table-cell>
          <table:table-cell table:style-name="ce9" office:value-type="float" office:value="1.291939" calcext:value-type="float">
            <text:p>1.291939</text:p>
          </table:table-cell>
          <table:table-cell table:style-name="ce9" office:value-type="float" office:value="1.722423" calcext:value-type="float">
            <text:p>1.722423</text:p>
          </table:table-cell>
          <table:table-cell table:style-name="ce9" office:value-type="float" office:value="0.636783" calcext:value-type="float">
            <text:p>0.636783</text:p>
          </table:table-cell>
          <table:table-cell table:style-name="ce23" office:value-type="float" office:value="0.194175" calcext:value-type="float">
            <text:p>0.194175</text:p>
          </table:table-cell>
          <table:table-cell table:style-name="ce23" office:value-type="float" office:value="0.483584" calcext:value-type="float">
            <text:p>0.483584</text:p>
          </table:table-cell>
          <table:table-cell table:style-name="ce23" office:value-type="float" office:value="57" calcext:value-type="float">
            <text:p>57</text:p>
          </table:table-cell>
          <table:table-cell table:style-name="ce2"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corridor_2</text:p>
          </table:table-cell>
          <table:table-cell table:style-name="ce10" office:value-type="float" office:value="35.450495" calcext:value-type="float">
            <text:p>35.450495</text:p>
          </table:table-cell>
          <table:table-cell table:style-name="ce10" office:value-type="float" office:value="1.360858" calcext:value-type="float">
            <text:p>1.360858</text:p>
          </table:table-cell>
          <table:table-cell table:style-name="ce10" office:value-type="float" office:value="1.801062" calcext:value-type="float">
            <text:p>1.801062</text:p>
          </table:table-cell>
          <table:table-cell table:style-name="ce10" office:value-type="float" office:value="0.480255" calcext:value-type="float">
            <text:p>0.480255</text:p>
          </table:table-cell>
          <table:table-cell table:style-name="ce24" office:value-type="float" office:value="0.605936" calcext:value-type="float">
            <text:p>0.605936</text:p>
          </table:table-cell>
          <table:table-cell table:style-name="ce24" office:value-type="float" office:value="1.023798" calcext:value-type="float">
            <text:p>1.023798</text:p>
          </table:table-cell>
          <table:table-cell table:style-name="ce24" office:value-type="float" office:value="63" calcext:value-type="float">
            <text:p>63</text:p>
          </table:table-cell>
          <table:table-cell table:style-name="ce2"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hg_1</text:p>
          </table:table-cell>
          <table:table-cell office:value-type="float" office:value="33.699482" calcext:value-type="float">
            <text:p>33.699482</text:p>
          </table:table-cell>
          <table:table-cell office:value-type="float" office:value="1.392056" calcext:value-type="float">
            <text:p>1.392056</text:p>
          </table:table-cell>
          <table:table-cell office:value-type="float" office:value="1.827786" calcext:value-type="float">
            <text:p>1.827786</text:p>
          </table:table-cell>
          <table:table-cell office:value-type="float" office:value="0.542788" calcext:value-type="float">
            <text:p>0.542788</text:p>
          </table:table-cell>
          <table:table-cell office:value-type="float" office:value="1.762196" calcext:value-type="float">
            <text:p>1.762196</text:p>
          </table:table-cell>
          <table:table-cell office:value-type="float" office:value="3.782848" calcext:value-type="float">
            <text:p>3.78284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hg_2</text:p>
          </table:table-cell>
          <table:table-cell office:value-type="float" office:value="35.641725" calcext:value-type="float">
            <text:p>35.641725</text:p>
          </table:table-cell>
          <table:table-cell office:value-type="float" office:value="1.230715" calcext:value-type="float">
            <text:p>1.230715</text:p>
          </table:table-cell>
          <table:table-cell office:value-type="float" office:value="2.075354" calcext:value-type="float">
            <text:p>2.075354</text:p>
          </table:table-cell>
          <table:table-cell office:value-type="float" office:value="0.347884" calcext:value-type="float">
            <text:p>0.347884</text:p>
          </table:table-cell>
          <table:table-cell office:value-type="float" office:value="4.825362" calcext:value-type="float">
            <text:p>4.825362</text:p>
          </table:table-cell>
          <table:table-cell office:value-type="float" office:value="3.924625" calcext:value-type="float">
            <text:p>3.92462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indoor</text:p>
          </table:table-cell>
          <table:table-cell table:style-name="ce10" office:value-type="float" office:value="3.820557" calcext:value-type="float">
            <text:p>3.820557</text:p>
          </table:table-cell>
          <table:table-cell table:style-name="ce16" office:value-type="float" office:value="9.610601" calcext:value-type="float">
            <text:p>9.610601</text:p>
          </table:table-cell>
          <table:table-cell table:style-name="ce10" office:value-type="float" office:value="2.203683" calcext:value-type="float">
            <text:p>2.203683</text:p>
          </table:table-cell>
          <table:table-cell table:style-name="ce10" office:value-type="float" office:value="0.174977" calcext:value-type="float">
            <text:p>0.174977</text:p>
          </table:table-cell>
          <table:table-cell table:style-name="ce24" office:value-type="float" office:value="5.908572" calcext:value-type="float">
            <text:p>5.908572</text:p>
          </table:table-cell>
          <table:table-cell table:style-name="ce24" office:value-type="float" office:value="2.91781" calcext:value-type="float">
            <text:p>2.9178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ramp_1</text:p>
          </table:table-cell>
          <table:table-cell office:value-type="float" office:value="54.808254" calcext:value-type="float">
            <text:p>54.808254</text:p>
          </table:table-cell>
          <table:table-cell office:value-type="float" office:value="1.114161" calcext:value-type="float">
            <text:p>1.114161</text:p>
          </table:table-cell>
          <table:table-cell office:value-type="float" office:value="1.78991" calcext:value-type="float">
            <text:p>1.78991</text:p>
          </table:table-cell>
          <table:table-cell office:value-type="float" office:value="0.44834" calcext:value-type="float">
            <text:p>0.44834</text:p>
          </table:table-cell>
          <table:table-cell office:value-type="float" office:value="0.344477" calcext:value-type="float">
            <text:p>0.344477</text:p>
          </table:table-cell>
          <table:table-cell office:value-type="float" office:value="0.474992" calcext:value-type="float">
            <text:p>0.47499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ramp_2</text:p>
          </table:table-cell>
          <table:table-cell office:value-type="float" office:value="33.854351" calcext:value-type="float">
            <text:p>33.854351</text:p>
          </table:table-cell>
          <table:table-cell office:value-type="float" office:value="1.152599" calcext:value-type="float">
            <text:p>1.152599</text:p>
          </table:table-cell>
          <table:table-cell office:value-type="float" office:value="1.685834" calcext:value-type="float">
            <text:p>1.685834</text:p>
          </table:table-cell>
          <table:table-cell office:value-type="float" office:value="0.453717" calcext:value-type="float">
            <text:p>0.453717</text:p>
          </table:table-cell>
          <table:table-cell office:value-type="float" office:value="0.479489" calcext:value-type="float">
            <text:p>0.479489</text:p>
          </table:table-cell>
          <table:table-cell office:value-type="float" office:value="0.711139" calcext:value-type="float">
            <text:p>0.711139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stairs</text:p>
          </table:table-cell>
          <table:table-cell office:value-type="float" office:value="107.58049" calcext:value-type="float">
            <text:p>107.58049</text:p>
          </table:table-cell>
          <table:table-cell office:value-type="float" office:value="1.961691" calcext:value-type="float">
            <text:p>1.961691</text:p>
          </table:table-cell>
          <table:table-cell office:value-type="float" office:value="1.872888" calcext:value-type="float">
            <text:p>1.872888</text:p>
          </table:table-cell>
          <table:table-cell office:value-type="float" office:value="0.513328" calcext:value-type="float">
            <text:p>0.513328</text:p>
          </table:table-cell>
          <table:table-cell office:value-type="float" office:value="2.355451" calcext:value-type="float">
            <text:p>2.355451</text:p>
          </table:table-cell>
          <table:table-cell office:value-type="float" office:value="4.296514" calcext:value-type="float">
            <text:p>4.296514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3">
          <table:covered-table-cell table:style-name="ce19"/>
          <table:table-cell office:value-type="string" calcext:value-type="string">
            <text:p>add attention mechanisms</text:p>
          </table:table-cell>
          <table:table-cell table:style-name="ce7"/>
          <table:table-cell table:style-name="ce33" office:value-type="string" calcext:value-type="string">
            <text:p>double</text:p>
          </table:table-cell>
          <table:table-cell table:style-name="ce13" office:value-type="float" office:value="62.950126" calcext:value-type="float">
            <text:p>62.950126</text:p>
          </table:table-cell>
          <table:table-cell table:style-name="ce13" office:value-type="float" office:value="5.576714" calcext:value-type="float">
            <text:p>5.576714</text:p>
          </table:table-cell>
          <table:table-cell table:style-name="ce13" office:value-type="float" office:value="1.571644" calcext:value-type="float">
            <text:p>1.571644</text:p>
          </table:table-cell>
          <table:table-cell table:style-name="ce13" office:value-type="float" office:value="0.493213" calcext:value-type="float">
            <text:p>0.493213</text:p>
          </table:table-cell>
          <table:table-cell table:style-name="ce27" office:value-type="float" office:value="0.453955" calcext:value-type="float">
            <text:p>0.453955</text:p>
          </table:table-cell>
          <table:table-cell table:style-name="ce27" office:value-type="float" office:value="1.184125" calcext:value-type="float">
            <text:p>1.184125</text:p>
          </table:table-cell>
          <table:table-cell table:style-name="ce27" office:value-type="float" office:value="521" calcext:value-type="float">
            <text:p>521</text:p>
          </table:table-cell>
          <table:table-cell table:number-columns-repeated="2"/>
        </table:table-row>
        <table:table-row table:style-name="ro3">
          <table:table-cell table:style-name="ce19"/>
          <table:table-cell/>
          <table:table-cell table:style-name="ce7"/>
          <table:table-cell table:style-name="ce61"/>
          <table:table-cell table:style-name="ce13" table:formula="of:=AVERAGE([.E12:.E15];[.E17:.E20])" office:value-type="float" office:value="49.926006" calcext:value-type="float">
            <text:p>49.926006</text:p>
          </table:table-cell>
          <table:table-cell table:style-name="ce13" table:formula="of:=AVERAGE([.F12:.F15];[.F17:.F20])" office:value-type="float" office:value="1.885091625" calcext:value-type="float">
            <text:p>1.885091625</text:p>
          </table:table-cell>
          <table:table-cell table:style-name="ce13" table:formula="of:=AVERAGE([.G12:.G15];[.G17:.G20])" office:value-type="float" office:value="1.793362625" calcext:value-type="float">
            <text:p>1.793362625</text:p>
          </table:table-cell>
          <table:table-cell table:style-name="ce13" table:formula="of:=AVERAGE([.H12:.H15];[.H17:.H20])" office:value-type="float" office:value="0.4895385" calcext:value-type="float">
            <text:p>0.4895385</text:p>
          </table:table-cell>
          <table:table-cell table:style-name="ce13" table:formula="of:=AVERAGE([.I12:.I15];[.I17:.I20])" office:value-type="float" office:value="1.377630125" calcext:value-type="float">
            <text:p>1.377630125</text:p>
          </table:table-cell>
          <table:table-cell table:style-name="ce13" table:formula="of:=AVERAGE([.J12:.J15];[.J17:.J20])" office:value-type="float" office:value="1.985203125" calcext:value-type="float">
            <text:p>1.985203125</text:p>
          </table:table-cell>
          <table:table-cell table:style-name="ce13" table:formula="of:=AVERAGE([.K12:.K15];[.K17:.K20])" office:value-type="float" office:value="117.625" calcext:value-type="float">
            <text:p>117.625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" office:value-type="string" calcext:value-type="string">
            <text:p>SFM</text:p>
          </table:table-cell>
          <table:table-cell table:style-name="ce5" office:value-type="string" calcext:value-type="string">
            <text:p>corridor_1</text:p>
          </table:table-cell>
          <table:table-cell table:style-name="ce14" office:value-type="float" office:value="35.263098" calcext:value-type="float">
            <text:p>35.263098</text:p>
          </table:table-cell>
          <table:table-cell table:style-name="ce14" office:value-type="float" office:value="1.060105" calcext:value-type="float">
            <text:p>1.060105</text:p>
          </table:table-cell>
          <table:table-cell table:style-name="ce14" office:value-type="float" office:value="1.725862" calcext:value-type="float">
            <text:p>1.725862</text:p>
          </table:table-cell>
          <table:table-cell table:style-name="ce14" office:value-type="float" office:value="0.568643" calcext:value-type="float">
            <text:p>0.568643</text:p>
          </table:table-cell>
          <table:table-cell table:style-name="ce28" office:value-type="float" office:value="0.197922" calcext:value-type="float">
            <text:p>0.197922</text:p>
          </table:table-cell>
          <table:table-cell table:style-name="ce28" office:value-type="float" office:value="0.455124" calcext:value-type="float">
            <text:p>0.455124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track</text:p>
          </table:table-cell>
          <table:table-cell office:value-type="string" calcext:value-type="string">
            <text:p>kalman filter params</text:p>
          </table:table-cell>
          <table:table-cell/>
          <table:table-cell table:style-name="ce6" office:value-type="string" calcext:value-type="string">
            <text:p>corridor_2</text:p>
          </table:table-cell>
          <table:table-cell office:value-type="float" office:value="37.131178" calcext:value-type="float">
            <text:p>37.131178</text:p>
          </table:table-cell>
          <table:table-cell office:value-type="float" office:value="1.622214" calcext:value-type="float">
            <text:p>1.622214</text:p>
          </table:table-cell>
          <table:table-cell office:value-type="float" office:value="1.783201" calcext:value-type="float">
            <text:p>1.783201</text:p>
          </table:table-cell>
          <table:table-cell office:value-type="float" office:value="0.461332" calcext:value-type="float">
            <text:p>0.461332</text:p>
          </table:table-cell>
          <table:table-cell office:value-type="float" office:value="0.694913" calcext:value-type="float">
            <text:p>0.694913</text:p>
          </table:table-cell>
          <table:table-cell office:value-type="float" office:value="1.322666" calcext:value-type="float">
            <text:p>1.322666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3">
          <table:table-cell table:style-name="ce8" office:value-type="string" calcext:value-type="string" table:number-columns-spanned="1" table:number-rows-spanned="3">
            <text:p>python3 offset_plot_ekf.py --visualize --min-sensor-distance 2.5 --max-pedestrians 1</text:p>
          </table:table-cell>
          <table:table-cell table:number-columns-repeated="2"/>
          <table:table-cell table:style-name="ce6" office:value-type="string" calcext:value-type="string">
            <text:p>hg_1</text:p>
          </table:table-cell>
          <table:table-cell office:value-type="float" office:value="40.911672" calcext:value-type="float">
            <text:p>40.911672</text:p>
          </table:table-cell>
          <table:table-cell office:value-type="float" office:value="2.743727" calcext:value-type="float">
            <text:p>2.743727</text:p>
          </table:table-cell>
          <table:table-cell office:value-type="float" office:value="1.862606" calcext:value-type="float">
            <text:p>1.862606</text:p>
          </table:table-cell>
          <table:table-cell office:value-type="float" office:value="0.510023" calcext:value-type="float">
            <text:p>0.510023</text:p>
          </table:table-cell>
          <table:table-cell office:value-type="float" office:value="1.535692" calcext:value-type="float">
            <text:p>1.535692</text:p>
          </table:table-cell>
          <table:table-cell office:value-type="float" office:value="3.418537" calcext:value-type="float">
            <text:p>3.41853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covered-table-cell/>
          <table:table-cell table:number-columns-repeated="2"/>
          <table:table-cell table:style-name="ce6" office:value-type="string" calcext:value-type="string">
            <text:p>hg_2</text:p>
          </table:table-cell>
          <table:table-cell office:value-type="float" office:value="36.614514" calcext:value-type="float">
            <text:p>36.614514</text:p>
          </table:table-cell>
          <table:table-cell office:value-type="float" office:value="1.316096" calcext:value-type="float">
            <text:p>1.316096</text:p>
          </table:table-cell>
          <table:table-cell office:value-type="float" office:value="2.086505" calcext:value-type="float">
            <text:p>2.086505</text:p>
          </table:table-cell>
          <table:table-cell office:value-type="float" office:value="0.373897" calcext:value-type="float">
            <text:p>0.373897</text:p>
          </table:table-cell>
          <table:table-cell office:value-type="float" office:value="4.454696" calcext:value-type="float">
            <text:p>4.454696</text:p>
          </table:table-cell>
          <table:table-cell office:value-type="float" office:value="4.433152" calcext:value-type="float">
            <text:p>4.43315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covered-table-cell/>
          <table:table-cell table:number-columns-repeated="2"/>
          <table:table-cell table:style-name="ce6" office:value-type="string" calcext:value-type="string">
            <text:p>indoor</text:p>
          </table:table-cell>
          <table:table-cell office:value-type="float" office:value="3.10473" calcext:value-type="float">
            <text:p>3.10473</text:p>
          </table:table-cell>
          <table:table-cell office:value-type="float" office:value="14.300254" calcext:value-type="float">
            <text:p>14.300254</text:p>
          </table:table-cell>
          <table:table-cell office:value-type="float" office:value="2.220832" calcext:value-type="float">
            <text:p>2.220832</text:p>
          </table:table-cell>
          <table:table-cell office:value-type="float" office:value="0.164653" calcext:value-type="float">
            <text:p>0.164653</text:p>
          </table:table-cell>
          <table:table-cell office:value-type="float" office:value="6.071169" calcext:value-type="float">
            <text:p>6.071169</text:p>
          </table:table-cell>
          <table:table-cell office:value-type="float" office:value="2.891096" calcext:value-type="float">
            <text:p>2.8910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6" office:value-type="string" calcext:value-type="string">
            <text:p>ramp_1</text:p>
          </table:table-cell>
          <table:table-cell office:value-type="float" office:value="62.459411" calcext:value-type="float">
            <text:p>62.459411</text:p>
          </table:table-cell>
          <table:table-cell office:value-type="float" office:value="2.047034" calcext:value-type="float">
            <text:p>2.047034</text:p>
          </table:table-cell>
          <table:table-cell office:value-type="float" office:value="1.750033" calcext:value-type="float">
            <text:p>1.750033</text:p>
          </table:table-cell>
          <table:table-cell office:value-type="float" office:value="0.429787" calcext:value-type="float">
            <text:p>0.429787</text:p>
          </table:table-cell>
          <table:table-cell office:value-type="float" office:value="0.55613" calcext:value-type="float">
            <text:p>0.55613</text:p>
          </table:table-cell>
          <table:table-cell office:value-type="float" office:value="1.195404" calcext:value-type="float">
            <text:p>1.19540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eval</text:p>
          </table:table-cell>
          <table:table-cell table:number-columns-repeated="2"/>
          <table:table-cell table:style-name="ce6" office:value-type="string" calcext:value-type="string">
            <text:p>ramp_2</text:p>
          </table:table-cell>
          <table:table-cell office:value-type="float" office:value="34.159032" calcext:value-type="float">
            <text:p>34.159032</text:p>
          </table:table-cell>
          <table:table-cell office:value-type="float" office:value="1.281411" calcext:value-type="float">
            <text:p>1.281411</text:p>
          </table:table-cell>
          <table:table-cell office:value-type="float" office:value="1.633888" calcext:value-type="float">
            <text:p>1.633888</text:p>
          </table:table-cell>
          <table:table-cell office:value-type="float" office:value="0.476505" calcext:value-type="float">
            <text:p>0.476505</text:p>
          </table:table-cell>
          <table:table-cell office:value-type="float" office:value="0.408895" calcext:value-type="float">
            <text:p>0.408895</text:p>
          </table:table-cell>
          <table:table-cell office:value-type="float" office:value="0.66935" calcext:value-type="float">
            <text:p>0.66935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ython3 evaluate.py --collision-radius 1.2</text:p>
          </table:table-cell>
          <table:table-cell table:number-columns-repeated="2"/>
          <table:table-cell table:style-name="ce6" office:value-type="string" calcext:value-type="string">
            <text:p>stairs</text:p>
          </table:table-cell>
          <table:table-cell office:value-type="float" office:value="114.849837" calcext:value-type="float">
            <text:p>114.849837</text:p>
          </table:table-cell>
          <table:table-cell office:value-type="float" office:value="3.439105" calcext:value-type="float">
            <text:p>3.439105</text:p>
          </table:table-cell>
          <table:table-cell office:value-type="float" office:value="1.882059" calcext:value-type="float">
            <text:p>1.882059</text:p>
          </table:table-cell>
          <table:table-cell office:value-type="float" office:value="0.486257" calcext:value-type="float">
            <text:p>0.486257</text:p>
          </table:table-cell>
          <table:table-cell office:value-type="float" office:value="2.49223" calcext:value-type="float">
            <text:p>2.49223</text:p>
          </table:table-cell>
          <table:table-cell office:value-type="float" office:value="4.286263" calcext:value-type="float">
            <text:p>4.286263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7"/>
          <table:table-cell table:style-name="ce7" office:value-type="string" calcext:value-type="string">
            <text:p>double</text:p>
          </table:table-cell>
          <table:table-cell table:style-name="ce13" office:value-type="float" office:value="66.898269" calcext:value-type="float">
            <text:p>66.898269</text:p>
          </table:table-cell>
          <table:table-cell table:style-name="ce13" office:value-type="float" office:value="9.683959" calcext:value-type="float">
            <text:p>9.683959</text:p>
          </table:table-cell>
          <table:table-cell table:style-name="ce13" office:value-type="float" office:value="1.605608" calcext:value-type="float">
            <text:p>1.605608</text:p>
          </table:table-cell>
          <table:table-cell table:style-name="ce13" office:value-type="float" office:value="0.475159" calcext:value-type="float">
            <text:p>0.475159</text:p>
          </table:table-cell>
          <table:table-cell table:style-name="ce27" office:value-type="float" office:value="0.559216" calcext:value-type="float">
            <text:p>0.559216</text:p>
          </table:table-cell>
          <table:table-cell table:style-name="ce27" office:value-type="float" office:value="1.265718" calcext:value-type="float">
            <text:p>1.265718</text:p>
          </table:table-cell>
          <table:table-cell table:style-name="ce27" office:value-type="float" office:value="489" calcext:value-type="float">
            <text:p>489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ax-sensor-distance</text:p>
          </table:table-cell>
          <table:table-cell table:style-name="ce7" table:number-columns-repeated="2"/>
          <table:table-cell table:style-name="ce13" table:formula="of:=AVERAGE([.E22:.E25];[.E27:.E30])" office:value-type="float" office:value="53.535876375" calcext:value-type="float">
            <text:p>53.535876375</text:p>
          </table:table-cell>
          <table:table-cell table:style-name="ce13" table:formula="of:=AVERAGE([.F22:.F25];[.F27:.F30])" office:value-type="float" office:value="2.899206375" calcext:value-type="float">
            <text:p>2.899206375</text:p>
          </table:table-cell>
          <table:table-cell table:style-name="ce13" table:formula="of:=AVERAGE([.G22:.G25];[.G27:.G30])" office:value-type="float" office:value="1.79122025" calcext:value-type="float">
            <text:p>1.79122025</text:p>
          </table:table-cell>
          <table:table-cell table:style-name="ce13" table:formula="of:=AVERAGE([.H22:.H25];[.H27:.H30])" office:value-type="float" office:value="0.472700375" calcext:value-type="float">
            <text:p>0.472700375</text:p>
          </table:table-cell>
          <table:table-cell table:style-name="ce13" table:formula="of:=AVERAGE([.I22:.I25];[.I27:.I30])" office:value-type="float" office:value="1.36246175" calcext:value-type="float">
            <text:p>1.36246175</text:p>
          </table:table-cell>
          <table:table-cell table:style-name="ce13" table:formula="of:=AVERAGE([.J22:.J25];[.J27:.J30])" office:value-type="float" office:value="2.13077675" calcext:value-type="float">
            <text:p>2.13077675</text:p>
          </table:table-cell>
          <table:table-cell table:style-name="ce13" table:formula="of:=AVERAGE([.K22:.K25];[.K27:.K30])" office:value-type="float" office:value="118.5" calcext:value-type="float">
            <text:p>118.5</text:p>
          </table:table-cell>
          <table:table-cell table:number-columns-repeated="2"/>
        </table:table-row>
      </table:table>
      <table:table table:name="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24"/>
        <table:table-column table:style-name="co10" table:default-cell-style-name="ce26"/>
        <table:table-column table:style-name="co11" table:default-cell-style-name="ce26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/>
          <table:table-cell table:style-name="ce4" office:value-type="string" calcext:value-type="string">
            <text:p>Planner</text:p>
          </table:table-cell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Path length </text:p>
            <text:p>(m)</text:p>
          </table:table-cell>
          <table:table-cell table:style-name="ce30" office:value-type="string" calcext:value-type="string">
            <text:p>Path irregularity </text:p>
            <text:p>(rad/m)</text:p>
          </table:table-cell>
          <table:table-cell table:style-name="ce30" office:value-type="string" calcext:value-type="string" table:number-columns-spanned="2" table:number-rows-spanned="1">
            <text:p>Closest-pedestrian distance </text:p>
            <text:p>(m)</text:p>
          </table:table-cell>
          <table:covered-table-cell table:style-name="ce30"/>
          <table:table-cell table:style-name="ce50" office:value-type="string" calcext:value-type="string" table:number-columns-spanned="3" table:number-rows-spanned="1">
            <text:p><text:span text:style-name="T1">Minimum </text:span><text:span text:style-name="T2">t</text:span><text:span text:style-name="T3">ime-to-collision </text:span></text:p>
            <text:p>(s) (number of collision)</text:p>
          </table:table-cell>
          <table:covered-table-cell table:number-columns-repeated="2" table:style-name="ce50"/>
          <table:table-cell table:number-columns-repeated="2"/>
        </table:table-row>
        <table:table-row table:style-name="ro2">
          <table:table-cell table:style-name="ce8" office:value-type="string" calcext:value-type="string" table:number-columns-spanned="1" table:number-rows-spanned="5">
            <text:p>python3 dataset.py --k_horizon_frames 60 --d_thresh 2.5 --node_inclusion_radius 50 --normalize_node_features --normalize_labels</text:p>
          </table:table-cell>
          <table:table-cell/>
          <table:table-cell table:style-name="ce5" office:value-type="string" calcext:value-type="string" table:number-columns-spanned="1" table:number-rows-spanned="10">
            <text:p>default</text:p>
          </table:table-cell>
          <table:table-cell table:style-name="ce5" office:value-type="string" calcext:value-type="string">
            <text:p>corridor_1</text:p>
          </table:table-cell>
          <table:table-cell table:style-name="ce9" office:value-type="float" office:value="28.33226" calcext:value-type="float">
            <text:p>28.33226</text:p>
          </table:table-cell>
          <table:table-cell table:style-name="ce15" office:value-type="float" office:value="0.289355" calcext:value-type="float">
            <text:p>0.289355</text:p>
          </table:table-cell>
          <table:table-cell table:style-name="ce9" office:value-type="float" office:value="1.666098" calcext:value-type="float">
            <text:p>1.666098</text:p>
          </table:table-cell>
          <table:table-cell table:style-name="ce9" office:value-type="float" office:value="0.535094" calcext:value-type="float">
            <text:p>0.535094</text:p>
          </table:table-cell>
          <table:table-cell table:style-name="ce23" office:value-type="float" office:value="0.257114" calcext:value-type="float">
            <text:p>0.257114</text:p>
          </table:table-cell>
          <table:table-cell table:style-name="ce23" office:value-type="float" office:value="0.436277" calcext:value-type="float">
            <text:p>0.436277</text:p>
          </table:table-cell>
          <table:table-cell table:style-name="ce23" office:value-type="float" office:value="62" calcext:value-type="float">
            <text:p>62</text:p>
          </table:table-cell>
          <table:table-cell table:style-name="ce2" table:number-columns-repeated="2"/>
        </table:table-row>
        <table:table-row table:style-name="ro2">
          <table:covered-table-cell/>
          <table:table-cell/>
          <table:covered-table-cell/>
          <table:table-cell table:style-name="ce52" office:value-type="string" calcext:value-type="string">
            <text:p>corridor_2</text:p>
          </table:table-cell>
          <table:table-cell table:style-name="ce10" office:value-type="float" office:value="33.823341" calcext:value-type="float">
            <text:p>33.823341</text:p>
          </table:table-cell>
          <table:table-cell table:style-name="ce16" office:value-type="float" office:value="0.295079" calcext:value-type="float">
            <text:p>0.295079</text:p>
          </table:table-cell>
          <table:table-cell table:style-name="ce10" office:value-type="float" office:value="1.751519" calcext:value-type="float">
            <text:p>1.751519</text:p>
          </table:table-cell>
          <table:table-cell table:style-name="ce10" office:value-type="float" office:value="0.482201" calcext:value-type="float">
            <text:p>0.482201</text:p>
          </table:table-cell>
          <table:table-cell office:value-type="float" office:value="0.329445" calcext:value-type="float">
            <text:p>0.329445</text:p>
          </table:table-cell>
          <table:table-cell table:style-name="ce24" office:value-type="float" office:value="0.447007" calcext:value-type="float">
            <text:p>0.447007</text:p>
          </table:table-cell>
          <table:table-cell table:style-name="ce24" office:value-type="float" office:value="68" calcext:value-type="float">
            <text:p>68</text:p>
          </table:table-cell>
          <table:table-cell table:style-name="ce2" table:number-columns-repeated="2"/>
        </table:table-row>
        <table:table-row table:style-name="ro2">
          <table:covered-table-cell/>
          <table:table-cell/>
          <table:covered-table-cell/>
          <table:table-cell table:style-name="ce52" office:value-type="string" calcext:value-type="string">
            <text:p>hg_1</text:p>
          </table:table-cell>
          <table:table-cell table:style-name="ce10" office:value-type="float" office:value="30.832657" calcext:value-type="float">
            <text:p>30.832657</text:p>
          </table:table-cell>
          <table:table-cell table:style-name="ce16" office:value-type="float" office:value="0.618833" calcext:value-type="float">
            <text:p>0.618833</text:p>
          </table:table-cell>
          <table:table-cell table:style-name="ce10" office:value-type="float" office:value="1.882136" calcext:value-type="float">
            <text:p>1.882136</text:p>
          </table:table-cell>
          <table:table-cell table:style-name="ce10" office:value-type="float" office:value="0.542216" calcext:value-type="float">
            <text:p>0.542216</text:p>
          </table:table-cell>
          <table:table-cell office:value-type="float" office:value="2.002271" calcext:value-type="float">
            <text:p>2.002271</text:p>
          </table:table-cell>
          <table:table-cell table:style-name="ce24" office:value-type="float" office:value="3.949093" calcext:value-type="float">
            <text:p>3.949093</text:p>
          </table:table-cell>
          <table:table-cell table:style-name="ce24" office:value-type="float" office:value="63" calcext:value-type="float">
            <text:p>63</text:p>
          </table:table-cell>
          <table:table-cell table:style-name="ce2" table:number-columns-repeated="2"/>
        </table:table-row>
        <table:table-row table:style-name="ro2">
          <table:covered-table-cell/>
          <table:table-cell/>
          <table:covered-table-cell/>
          <table:table-cell table:style-name="ce52" office:value-type="string" calcext:value-type="string">
            <text:p>hg_2</text:p>
          </table:table-cell>
          <table:table-cell table:style-name="ce10" office:value-type="float" office:value="34.614429" calcext:value-type="float">
            <text:p>34.614429</text:p>
          </table:table-cell>
          <table:table-cell table:style-name="ce16" office:value-type="float" office:value="0.468855" calcext:value-type="float">
            <text:p>0.468855</text:p>
          </table:table-cell>
          <table:table-cell table:style-name="ce10" office:value-type="float" office:value="2.032663" calcext:value-type="float">
            <text:p>2.032663</text:p>
          </table:table-cell>
          <table:table-cell table:style-name="ce10" office:value-type="float" office:value="0.416476" calcext:value-type="float">
            <text:p>0.416476</text:p>
          </table:table-cell>
          <table:table-cell office:value-type="float" office:value="2.477502" calcext:value-type="float">
            <text:p>2.477502</text:p>
          </table:table-cell>
          <table:table-cell table:style-name="ce24" office:value-type="float" office:value="3.800023" calcext:value-type="float">
            <text:p>3.800023</text:p>
          </table:table-cell>
          <table:table-cell table:style-name="ce24" office:value-type="float" office:value="20" calcext:value-type="float">
            <text:p>20</text:p>
          </table:table-cell>
          <table:table-cell table:style-name="ce2" table:number-columns-repeated="2"/>
        </table:table-row>
        <table:table-row table:style-name="ro2">
          <table:covered-table-cell/>
          <table:table-cell/>
          <table:covered-table-cell/>
          <table:table-cell table:style-name="ce52" office:value-type="string" calcext:value-type="string">
            <text:p>indoor</text:p>
          </table:table-cell>
          <table:table-cell table:style-name="ce10" office:value-type="float" office:value="3.079998" calcext:value-type="float">
            <text:p>3.079998</text:p>
          </table:table-cell>
          <table:table-cell table:style-name="ce16" office:value-type="float" office:value="10.225458" calcext:value-type="float">
            <text:p>10.225458</text:p>
          </table:table-cell>
          <table:table-cell table:style-name="ce10" office:value-type="float" office:value="2.210031" calcext:value-type="float">
            <text:p>2.210031</text:p>
          </table:table-cell>
          <table:table-cell table:style-name="ce10" office:value-type="float" office:value="0.150273" calcext:value-type="float">
            <text:p>0.150273</text:p>
          </table:table-cell>
          <table:table-cell office:value-type="string" calcext:value-type="string">
            <text:p>inf</text:p>
          </table:table-cell>
          <table:table-cell table:style-name="ce24" office:value-type="string" calcext:value-type="string">
            <text:p>inf</text:p>
          </table:table-cell>
          <table:table-cell table:style-name="ce24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2">
          <table:table-cell table:number-columns-repeated="2"/>
          <table:covered-table-cell/>
          <table:table-cell table:style-name="ce52" office:value-type="string" calcext:value-type="string">
            <text:p>ramp_1</text:p>
          </table:table-cell>
          <table:table-cell table:style-name="ce10" office:value-type="float" office:value="47.324751" calcext:value-type="float">
            <text:p>47.324751</text:p>
          </table:table-cell>
          <table:table-cell table:style-name="ce16" office:value-type="float" office:value="0.221922" calcext:value-type="float">
            <text:p>0.221922</text:p>
          </table:table-cell>
          <table:table-cell table:style-name="ce10" office:value-type="float" office:value="1.722469" calcext:value-type="float">
            <text:p>1.722469</text:p>
          </table:table-cell>
          <table:table-cell table:style-name="ce10" office:value-type="float" office:value="0.406112" calcext:value-type="float">
            <text:p>0.406112</text:p>
          </table:table-cell>
          <table:table-cell office:value-type="float" office:value="0.292868" calcext:value-type="float">
            <text:p>0.292868</text:p>
          </table:table-cell>
          <table:table-cell table:style-name="ce24" office:value-type="float" office:value="0.423458" calcext:value-type="float">
            <text:p>0.423458</text:p>
          </table:table-cell>
          <table:table-cell table:style-name="ce24" office:value-type="float" office:value="36" calcext:value-type="float">
            <text:p>36</text:p>
          </table:table-cell>
          <table:table-cell table:style-name="ce2" table:number-columns-repeated="2"/>
        </table:table-row>
        <table:table-row table:style-name="ro2">
          <table:table-cell table:style-name="ce1" office:value-type="string" calcext:value-type="string">
            <text:p>train</text:p>
          </table:table-cell>
          <table:table-cell/>
          <table:covered-table-cell/>
          <table:table-cell table:style-name="ce52" office:value-type="string" calcext:value-type="string">
            <text:p>ramp_2</text:p>
          </table:table-cell>
          <table:table-cell table:style-name="ce10" office:value-type="float" office:value="39.575738" calcext:value-type="float">
            <text:p>39.575738</text:p>
          </table:table-cell>
          <table:table-cell table:style-name="ce16" office:value-type="float" office:value="0.272246" calcext:value-type="float">
            <text:p>0.272246</text:p>
          </table:table-cell>
          <table:table-cell table:style-name="ce10" office:value-type="float" office:value="1.60099" calcext:value-type="float">
            <text:p>1.60099</text:p>
          </table:table-cell>
          <table:table-cell table:style-name="ce10" office:value-type="float" office:value="0.472988" calcext:value-type="float">
            <text:p>0.472988</text:p>
          </table:table-cell>
          <table:table-cell office:value-type="float" office:value="0.458121" calcext:value-type="float">
            <text:p>0.458121</text:p>
          </table:table-cell>
          <table:table-cell table:style-name="ce24" office:value-type="float" office:value="0.681647" calcext:value-type="float">
            <text:p>0.681647</text:p>
          </table:table-cell>
          <table:table-cell table:style-name="ce24" office:value-type="float" office:value="102" calcext:value-type="float">
            <text:p>102</text:p>
          </table:table-cell>
          <table:table-cell table:style-name="ce2" table:number-columns-repeated="2"/>
        </table:table-row>
        <table:table-row table:style-name="ro2">
          <table:table-cell table:style-name="ce48" office:value-type="string" calcext:value-type="string" table:number-columns-spanned="1" table:number-rows-spanned="12">
            <text:p>python3 train.py --batch_size 256 --epochs 40 --lr 5e-4 --weight_decay 1e-4 --hidden_dim 64 --filtered_files_json data/filtered_files.json --num_layers 1 --model SocialForceGNN --consistency_loss --lambda_cons 0.0 --dropout_p 0.1</text:p>
          </table:table-cell>
          <table:table-cell/>
          <table:covered-table-cell/>
          <table:table-cell office:value-type="string" calcext:value-type="string">
            <text:p>stairs</text:p>
          </table:table-cell>
          <table:table-cell table:style-name="Default" office:value-type="float" office:value="105.147577" calcext:value-type="float">
            <text:p>105.147577</text:p>
          </table:table-cell>
          <table:table-cell table:style-name="ce16" office:value-type="float" office:value="1.788273" calcext:value-type="float">
            <text:p>1.788273</text:p>
          </table:table-cell>
          <table:table-cell table:style-name="ce10" office:value-type="float" office:value="1.862526" calcext:value-type="float">
            <text:p>1.862526</text:p>
          </table:table-cell>
          <table:table-cell table:style-name="ce10" office:value-type="float" office:value="0.517562" calcext:value-type="float">
            <text:p>0.517562</text:p>
          </table:table-cell>
          <table:table-cell office:value-type="float" office:value="2.131445" calcext:value-type="float">
            <text:p>2.131445</text:p>
          </table:table-cell>
          <table:table-cell table:style-name="ce24" office:value-type="float" office:value="3.86285" calcext:value-type="float">
            <text:p>3.86285</text:p>
          </table:table-cell>
          <table:table-cell table:style-name="ce24" office:value-type="float" office:value="141" calcext:value-type="float">
            <text:p>141</text:p>
          </table:table-cell>
          <table:table-cell table:style-name="ce2" table:number-columns-repeated="2"/>
        </table:table-row>
        <table:table-row table:style-name="ro2">
          <table:covered-table-cell/>
          <table:table-cell/>
          <table:covered-table-cell table:style-name="ce7"/>
          <table:table-cell table:style-name="ce7" office:value-type="string" calcext:value-type="string">
            <text:p>double</text:p>
          </table:table-cell>
          <table:table-cell table:style-name="ce11" office:value-type="float" office:value="58.957565" calcext:value-type="float">
            <text:p>58.957565</text:p>
          </table:table-cell>
          <table:table-cell table:style-name="ce17" office:value-type="float" office:value="7.263742" calcext:value-type="float">
            <text:p>7.263742</text:p>
          </table:table-cell>
          <table:table-cell table:style-name="ce11" office:value-type="float" office:value="1.559778" calcext:value-type="float">
            <text:p>1.559778</text:p>
          </table:table-cell>
          <table:table-cell table:style-name="ce11" office:value-type="float" office:value="0.493613" calcext:value-type="float">
            <text:p>0.493613</text:p>
          </table:table-cell>
          <table:table-cell table:style-name="ce25" office:value-type="float" office:value="0.458409" calcext:value-type="float">
            <text:p>0.458409</text:p>
          </table:table-cell>
          <table:table-cell table:style-name="ce25" office:value-type="float" office:value="1.216825" calcext:value-type="float">
            <text:p>1.216825</text:p>
          </table:table-cell>
          <table:table-cell table:style-name="ce25" office:value-type="float" office:value="528" calcext:value-type="float">
            <text:p>528</text:p>
          </table:table-cell>
          <table:table-cell table:style-name="ce2" table:number-columns-repeated="2"/>
        </table:table-row>
        <table:table-row table:style-name="ro2">
          <table:covered-table-cell/>
          <table:table-cell/>
          <table:covered-table-cell table:style-name="ce7"/>
          <table:table-cell table:style-name="ce7" office:value-type="string" calcext:value-type="string">
            <text:p>average</text:p>
          </table:table-cell>
          <table:table-cell table:style-name="ce11" table:formula="of:=AVERAGE([.E2:.E10])" office:value-type="float" office:value="42.4098128888889" calcext:value-type="float">
            <text:p>42.4098128888889</text:p>
          </table:table-cell>
          <table:table-cell table:style-name="ce17" table:formula="of:=AVERAGE([.F2:.F10])" office:value-type="float" office:value="2.38264033333333" calcext:value-type="float">
            <text:p>2.38264033333333</text:p>
          </table:table-cell>
          <table:table-cell table:style-name="ce11" table:formula="of:=AVERAGE([.G2:.G10])" office:value-type="float" office:value="1.80980111111111" calcext:value-type="float">
            <text:p>1.80980111111111</text:p>
          </table:table-cell>
          <table:table-cell table:style-name="ce11" table:formula="of:=AVERAGE([.H2:.H10])" office:value-type="float" office:value="0.446281666666667" calcext:value-type="float">
            <text:p>0.446281666666667</text:p>
          </table:table-cell>
          <table:table-cell table:style-name="ce25" table:formula="of:=AVERAGE([.I2:.I5];[.I7:.I10])" office:value-type="float" office:value="1.050896875" calcext:value-type="float">
            <text:p>1.050896875</text:p>
          </table:table-cell>
          <table:table-cell table:style-name="ce25" table:formula="of:=AVERAGE([.J2:.J5];[.J7:.J10])" office:value-type="float" office:value="1.8521475" calcext:value-type="float">
            <text:p>1.8521475</text:p>
          </table:table-cell>
          <table:table-cell table:style-name="ce25" table:formula="of:=AVERAGE([.K2:.K10])" office:value-type="float" office:value="113.333333333333" calcext:value-type="float">
            <text:p>113.333333333333</text:p>
          </table:table-cell>
          <table:table-cell table:style-name="ce2" table:number-columns-repeated="2"/>
        </table:table-row>
        <table:table-row table:style-name="ro3">
          <table:covered-table-cell/>
          <table:table-cell/>
          <table:table-cell table:style-name="ce5" office:value-type="string" calcext:value-type="string" table:number-columns-spanned="1" table:number-rows-spanned="10">
            <text:p>GNN</text:p>
          </table:table-cell>
          <table:table-cell table:style-name="ce59" office:value-type="string" calcext:value-type="string">
            <text:p>corridor_1</text:p>
          </table:table-cell>
          <table:table-cell table:style-name="ce9" office:value-type="float" office:value="29.253841" calcext:value-type="float">
            <text:p>29.253841</text:p>
          </table:table-cell>
          <table:table-cell table:style-name="ce9" office:value-type="float" office:value="1.360699" calcext:value-type="float">
            <text:p>1.360699</text:p>
          </table:table-cell>
          <table:table-cell table:style-name="ce9" office:value-type="float" office:value="1.781789" calcext:value-type="float">
            <text:p>1.781789</text:p>
          </table:table-cell>
          <table:table-cell table:style-name="ce9" office:value-type="float" office:value="0.584467" calcext:value-type="float">
            <text:p>0.584467</text:p>
          </table:table-cell>
          <table:table-cell table:style-name="ce39" office:value-type="float" office:value="0.363484" calcext:value-type="float">
            <text:p>0.363484</text:p>
          </table:table-cell>
          <table:table-cell table:style-name="ce23" office:value-type="float" office:value="0.577288" calcext:value-type="float">
            <text:p>0.577288</text:p>
          </table:table-cell>
          <table:table-cell table:style-name="ce23" office:value-type="float" office:value="57" calcext:value-type="float">
            <text:p>57</text:p>
          </table:table-cell>
          <table:table-cell table:style-name="ce2" table:number-columns-repeated="2"/>
        </table:table-row>
        <table:table-row table:style-name="ro3">
          <table:covered-table-cell/>
          <table:table-cell/>
          <table:covered-table-cell/>
          <table:table-cell table:style-name="ce60" office:value-type="string" calcext:value-type="string">
            <text:p>corridor_2</text:p>
          </table:table-cell>
          <table:table-cell table:style-name="ce10" office:value-type="float" office:value="35.0882" calcext:value-type="float">
            <text:p>35.0882</text:p>
          </table:table-cell>
          <table:table-cell table:style-name="ce10" office:value-type="float" office:value="1.691669" calcext:value-type="float">
            <text:p>1.691669</text:p>
          </table:table-cell>
          <table:table-cell table:style-name="ce10" office:value-type="float" office:value="1.814189" calcext:value-type="float">
            <text:p>1.814189</text:p>
          </table:table-cell>
          <table:table-cell table:style-name="ce10" office:value-type="float" office:value="0.519316" calcext:value-type="float">
            <text:p>0.519316</text:p>
          </table:table-cell>
          <table:table-cell table:style-name="ce63" office:value-type="float" office:value="0.395038" calcext:value-type="float">
            <text:p>0.395038</text:p>
          </table:table-cell>
          <table:table-cell table:style-name="ce24" office:value-type="float" office:value="0.497174" calcext:value-type="float">
            <text:p>0.497174</text:p>
          </table:table-cell>
          <table:table-cell table:style-name="ce24" office:value-type="float" office:value="65" calcext:value-type="float">
            <text:p>65</text:p>
          </table:table-cell>
          <table:table-cell table:style-name="ce2" table:number-columns-repeated="2"/>
        </table:table-row>
        <table:table-row table:style-name="ro3">
          <table:covered-table-cell/>
          <table:table-cell/>
          <table:covered-table-cell/>
          <table:table-cell table:style-name="ce60" office:value-type="string" calcext:value-type="string">
            <text:p>hg_1</text:p>
          </table:table-cell>
          <table:table-cell office:value-type="float" office:value="31.664743" calcext:value-type="float">
            <text:p>31.664743</text:p>
          </table:table-cell>
          <table:table-cell office:value-type="float" office:value="1.51903" calcext:value-type="float">
            <text:p>1.51903</text:p>
          </table:table-cell>
          <table:table-cell office:value-type="float" office:value="1.87982" calcext:value-type="float">
            <text:p>1.87982</text:p>
          </table:table-cell>
          <table:table-cell office:value-type="float" office:value="0.542267" calcext:value-type="float">
            <text:p>0.542267</text:p>
          </table:table-cell>
          <table:table-cell table:style-name="ce44" office:value-type="float" office:value="2.155845" calcext:value-type="float">
            <text:p>2.155845</text:p>
          </table:table-cell>
          <table:table-cell office:value-type="float" office:value="4.042823" calcext:value-type="float">
            <text:p>4.042823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covered-table-cell/>
          <table:table-cell/>
          <table:covered-table-cell/>
          <table:table-cell table:style-name="ce52" office:value-type="string" calcext:value-type="string">
            <text:p>hg_2</text:p>
          </table:table-cell>
          <table:table-cell office:value-type="float" office:value="35.906925" calcext:value-type="float">
            <text:p>35.906925</text:p>
          </table:table-cell>
          <table:table-cell office:value-type="float" office:value="1.610877" calcext:value-type="float">
            <text:p>1.610877</text:p>
          </table:table-cell>
          <table:table-cell office:value-type="float" office:value="2.01878" calcext:value-type="float">
            <text:p>2.01878</text:p>
          </table:table-cell>
          <table:table-cell office:value-type="float" office:value="0.413029" calcext:value-type="float">
            <text:p>0.413029</text:p>
          </table:table-cell>
          <table:table-cell table:style-name="ce26" office:value-type="float" office:value="2.207777" calcext:value-type="float">
            <text:p>2.207777</text:p>
          </table:table-cell>
          <table:table-cell office:value-type="float" office:value="3.235966" calcext:value-type="float">
            <text:p>3.23596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covered-table-cell/>
          <table:table-cell/>
          <table:covered-table-cell/>
          <table:table-cell table:style-name="ce60" office:value-type="string" calcext:value-type="string">
            <text:p>indoor</text:p>
          </table:table-cell>
          <table:table-cell table:style-name="ce10" office:value-type="float" office:value="3.184768" calcext:value-type="float">
            <text:p>3.184768</text:p>
          </table:table-cell>
          <table:table-cell table:style-name="ce16" office:value-type="float" office:value="11.604801" calcext:value-type="float">
            <text:p>11.604801</text:p>
          </table:table-cell>
          <table:table-cell table:style-name="ce10" office:value-type="float" office:value="2.208218" calcext:value-type="float">
            <text:p>2.208218</text:p>
          </table:table-cell>
          <table:table-cell table:style-name="ce10" office:value-type="float" office:value="0.151387" calcext:value-type="float">
            <text:p>0.151387</text:p>
          </table:table-cell>
          <table:table-cell office:value-type="string" calcext:value-type="string">
            <text:p>inf</text:p>
          </table:table-cell>
          <table:table-cell table:style-name="ce24" office:value-type="string" calcext:value-type="string">
            <text:p>inf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covered-table-cell/>
          <table:table-cell/>
          <table:covered-table-cell/>
          <table:table-cell table:style-name="ce60" office:value-type="string" calcext:value-type="string">
            <text:p>ramp_1</text:p>
          </table:table-cell>
          <table:table-cell office:value-type="float" office:value="48.648956" calcext:value-type="float">
            <text:p>48.648956</text:p>
          </table:table-cell>
          <table:table-cell office:value-type="float" office:value="0.988779" calcext:value-type="float">
            <text:p>0.988779</text:p>
          </table:table-cell>
          <table:table-cell office:value-type="float" office:value="1.746639" calcext:value-type="float">
            <text:p>1.746639</text:p>
          </table:table-cell>
          <table:table-cell office:value-type="float" office:value="0.398209" calcext:value-type="float">
            <text:p>0.398209</text:p>
          </table:table-cell>
          <table:table-cell table:style-name="ce44" office:value-type="float" office:value="0.408077" calcext:value-type="float">
            <text:p>0.408077</text:p>
          </table:table-cell>
          <table:table-cell office:value-type="float" office:value="0.393417" calcext:value-type="float">
            <text:p>0.39341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covered-table-cell/>
          <table:table-cell/>
          <table:covered-table-cell/>
          <table:table-cell table:style-name="ce60" office:value-type="string" calcext:value-type="string">
            <text:p>ramp_2</text:p>
          </table:table-cell>
          <table:table-cell office:value-type="float" office:value="47.964433" calcext:value-type="float">
            <text:p>47.964433</text:p>
          </table:table-cell>
          <table:table-cell office:value-type="float" office:value="1.148438" calcext:value-type="float">
            <text:p>1.148438</text:p>
          </table:table-cell>
          <table:table-cell office:value-type="float" office:value="1.572966" calcext:value-type="float">
            <text:p>1.572966</text:p>
          </table:table-cell>
          <table:table-cell office:value-type="float" office:value="0.467616" calcext:value-type="float">
            <text:p>0.467616</text:p>
          </table:table-cell>
          <table:table-cell table:style-name="ce44" office:value-type="float" office:value="0.532333" calcext:value-type="float">
            <text:p>0.532333</text:p>
          </table:table-cell>
          <table:table-cell office:value-type="float" office:value="0.70691" calcext:value-type="float">
            <text:p>0.70691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3">
          <table:covered-table-cell/>
          <table:table-cell/>
          <table:covered-table-cell/>
          <table:table-cell table:style-name="ce60" office:value-type="string" calcext:value-type="string">
            <text:p>stairs</text:p>
          </table:table-cell>
          <table:table-cell office:value-type="float" office:value="109.047121" calcext:value-type="float">
            <text:p>109.047121</text:p>
          </table:table-cell>
          <table:table-cell office:value-type="float" office:value="2.296232" calcext:value-type="float">
            <text:p>2.296232</text:p>
          </table:table-cell>
          <table:table-cell office:value-type="float" office:value="1.904614" calcext:value-type="float">
            <text:p>1.904614</text:p>
          </table:table-cell>
          <table:table-cell office:value-type="float" office:value="0.532819" calcext:value-type="float">
            <text:p>0.532819</text:p>
          </table:table-cell>
          <table:table-cell table:style-name="ce44" office:value-type="float" office:value="2.355999" calcext:value-type="float">
            <text:p>2.355999</text:p>
          </table:table-cell>
          <table:table-cell office:value-type="float" office:value="4.647537" calcext:value-type="float">
            <text:p>4.647537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3">
          <table:covered-table-cell table:style-name="ce19"/>
          <table:table-cell/>
          <table:covered-table-cell table:style-name="ce7"/>
          <table:table-cell table:style-name="ce61" office:value-type="string" calcext:value-type="string">
            <text:p>double</text:p>
          </table:table-cell>
          <table:table-cell table:style-name="ce13" office:value-type="float" office:value="63.095305" calcext:value-type="float">
            <text:p>63.095305</text:p>
          </table:table-cell>
          <table:table-cell table:style-name="ce13" office:value-type="float" office:value="6.227649" calcext:value-type="float">
            <text:p>6.227649</text:p>
          </table:table-cell>
          <table:table-cell table:style-name="ce13" office:value-type="float" office:value="1.565053" calcext:value-type="float">
            <text:p>1.565053</text:p>
          </table:table-cell>
          <table:table-cell table:style-name="ce13" office:value-type="float" office:value="0.498479" calcext:value-type="float">
            <text:p>0.498479</text:p>
          </table:table-cell>
          <table:table-cell table:style-name="ce47" office:value-type="float" office:value="0.485811" calcext:value-type="float">
            <text:p>0.485811</text:p>
          </table:table-cell>
          <table:table-cell table:style-name="ce27" office:value-type="float" office:value="1.219183" calcext:value-type="float">
            <text:p>1.219183</text:p>
          </table:table-cell>
          <table:table-cell table:style-name="ce27" office:value-type="float" office:value="533" calcext:value-type="float">
            <text:p>533</text:p>
          </table:table-cell>
          <table:table-cell table:number-columns-repeated="2"/>
        </table:table-row>
        <table:table-row table:style-name="ro3">
          <table:table-cell table:style-name="ce19"/>
          <table:table-cell/>
          <table:covered-table-cell table:style-name="ce7"/>
          <table:table-cell table:style-name="ce61" office:value-type="string" calcext:value-type="string">
            <text:p>average</text:p>
          </table:table-cell>
          <table:table-cell table:style-name="ce13" table:formula="of:=AVERAGE([.E12:.E20])" office:value-type="float" office:value="44.8726991111111" calcext:value-type="float">
            <text:p>44.8726991111111</text:p>
          </table:table-cell>
          <table:table-cell table:style-name="ce13" table:formula="of:=AVERAGE([.F12:.F20])" office:value-type="float" office:value="3.16090822222222" calcext:value-type="float">
            <text:p>3.16090822222222</text:p>
          </table:table-cell>
          <table:table-cell table:style-name="ce13" table:formula="of:=AVERAGE([.G12:.G20])" office:value-type="float" office:value="1.832452" calcext:value-type="float">
            <text:p>1.832452</text:p>
          </table:table-cell>
          <table:table-cell table:style-name="ce13" table:formula="of:=AVERAGE([.H12:.H20])" office:value-type="float" office:value="0.456398777777778" calcext:value-type="float">
            <text:p>0.456398777777778</text:p>
          </table:table-cell>
          <table:table-cell table:style-name="ce27" table:formula="of:=AVERAGE([.I12:.I15];[.I17:.I20])" office:value-type="float" office:value="1.1130455" calcext:value-type="float">
            <text:p>1.1130455</text:p>
          </table:table-cell>
          <table:table-cell table:style-name="ce27" table:formula="of:=AVERAGE([.J12:.J15];[.J17:.J20])" office:value-type="float" office:value="1.91503725" calcext:value-type="float">
            <text:p>1.91503725</text:p>
          </table:table-cell>
          <table:table-cell table:style-name="ce27" table:formula="of:=AVERAGE([.K12:.K20])" office:value-type="float" office:value="109.333333333333" calcext:value-type="float">
            <text:p>109.333333333333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" office:value-type="string" calcext:value-type="string">
            <text:p>SFM</text:p>
          </table:table-cell>
          <table:table-cell table:style-name="ce5" office:value-type="string" calcext:value-type="string">
            <text:p>corridor_1</text:p>
          </table:table-cell>
          <table:table-cell table:style-name="ce14" office:value-type="float" office:value="28.272724" calcext:value-type="float">
            <text:p>28.272724</text:p>
          </table:table-cell>
          <table:table-cell table:style-name="ce14" office:value-type="float" office:value="0.578301" calcext:value-type="float">
            <text:p>0.578301</text:p>
          </table:table-cell>
          <table:table-cell table:style-name="ce14" office:value-type="float" office:value="1.698921" calcext:value-type="float">
            <text:p>1.698921</text:p>
          </table:table-cell>
          <table:table-cell table:style-name="ce14" office:value-type="float" office:value="0.514705" calcext:value-type="float">
            <text:p>0.514705</text:p>
          </table:table-cell>
          <table:table-cell table:style-name="ce28" office:value-type="float" office:value="0.276919" calcext:value-type="float">
            <text:p>0.276919</text:p>
          </table:table-cell>
          <table:table-cell table:style-name="ce28" office:value-type="float" office:value="0.455792" calcext:value-type="float">
            <text:p>0.455792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track</text:p>
          </table:table-cell>
          <table:table-cell office:value-type="string" calcext:value-type="string">
            <text:p>try: min-prediction-speed</text:p>
          </table:table-cell>
          <table:table-cell/>
          <table:table-cell office:value-type="string" calcext:value-type="string">
            <text:p>corridor_2</text:p>
          </table:table-cell>
          <table:table-cell office:value-type="float" office:value="36.32153" calcext:value-type="float">
            <text:p>36.32153</text:p>
          </table:table-cell>
          <table:table-cell office:value-type="float" office:value="1.506624" calcext:value-type="float">
            <text:p>1.506624</text:p>
          </table:table-cell>
          <table:table-cell office:value-type="float" office:value="1.780935" calcext:value-type="float">
            <text:p>1.780935</text:p>
          </table:table-cell>
          <table:table-cell office:value-type="float" office:value="0.456776" calcext:value-type="float">
            <text:p>0.456776</text:p>
          </table:table-cell>
          <table:table-cell table:style-name="ce26" office:value-type="float" office:value="0.556881" calcext:value-type="float">
            <text:p>0.556881</text:p>
          </table:table-cell>
          <table:table-cell office:value-type="float" office:value="0.72013" calcext:value-type="float">
            <text:p>0.72013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table:style-name="ce8" office:value-type="string" calcext:value-type="string" table:number-columns-spanned="1" table:number-rows-spanned="3">
            <text:p>python3 offset_plot_ekf.py --visualize --min-sensor-distance 2.5 --max-pedestrians 1</text:p>
          </table:table-cell>
          <table:table-cell office:value-type="string" calcext:value-type="string">
            <text:p>try: min-tracking-states</text:p>
          </table:table-cell>
          <table:table-cell/>
          <table:table-cell office:value-type="string" calcext:value-type="string">
            <text:p>hg_1</text:p>
          </table:table-cell>
          <table:table-cell office:value-type="float" office:value="38.790568" calcext:value-type="float">
            <text:p>38.790568</text:p>
          </table:table-cell>
          <table:table-cell office:value-type="float" office:value="2.912972" calcext:value-type="float">
            <text:p>2.912972</text:p>
          </table:table-cell>
          <table:table-cell office:value-type="float" office:value="1.923941" calcext:value-type="float">
            <text:p>1.923941</text:p>
          </table:table-cell>
          <table:table-cell office:value-type="float" office:value="0.50451" calcext:value-type="float">
            <text:p>0.50451</text:p>
          </table:table-cell>
          <table:table-cell table:style-name="ce26" office:value-type="float" office:value="2.119611" calcext:value-type="float">
            <text:p>2.119611</text:p>
          </table:table-cell>
          <table:table-cell office:value-type="float" office:value="4.147264" calcext:value-type="float">
            <text:p>4.147264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hg_2</text:p>
          </table:table-cell>
          <table:table-cell office:value-type="float" office:value="36.773539" calcext:value-type="float">
            <text:p>36.773539</text:p>
          </table:table-cell>
          <table:table-cell office:value-type="float" office:value="1.402562" calcext:value-type="float">
            <text:p>1.402562</text:p>
          </table:table-cell>
          <table:table-cell office:value-type="float" office:value="2.060746" calcext:value-type="float">
            <text:p>2.060746</text:p>
          </table:table-cell>
          <table:table-cell office:value-type="float" office:value="0.399872" calcext:value-type="float">
            <text:p>0.399872</text:p>
          </table:table-cell>
          <table:table-cell table:style-name="ce26" office:value-type="float" office:value="3.330239" calcext:value-type="float">
            <text:p>3.330239</text:p>
          </table:table-cell>
          <table:table-cell office:value-type="float" office:value="4.257635" calcext:value-type="float">
            <text:p>4.25763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indoor</text:p>
          </table:table-cell>
          <table:table-cell office:value-type="float" office:value="3.112746" calcext:value-type="float">
            <text:p>3.112746</text:p>
          </table:table-cell>
          <table:table-cell office:value-type="float" office:value="13.970019" calcext:value-type="float">
            <text:p>13.970019</text:p>
          </table:table-cell>
          <table:table-cell office:value-type="float" office:value="2.222407" calcext:value-type="float">
            <text:p>2.222407</text:p>
          </table:table-cell>
          <table:table-cell office:value-type="float" office:value="0.1506" calcext:value-type="float">
            <text:p>0.1506</text:p>
          </table:table-cell>
          <table:table-cell table:style-name="ce26"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amp_1</text:p>
          </table:table-cell>
          <table:table-cell office:value-type="float" office:value="55.338351" calcext:value-type="float">
            <text:p>55.338351</text:p>
          </table:table-cell>
          <table:table-cell office:value-type="float" office:value="1.690355" calcext:value-type="float">
            <text:p>1.690355</text:p>
          </table:table-cell>
          <table:table-cell office:value-type="float" office:value="1.758982" calcext:value-type="float">
            <text:p>1.758982</text:p>
          </table:table-cell>
          <table:table-cell office:value-type="float" office:value="0.39629" calcext:value-type="float">
            <text:p>0.39629</text:p>
          </table:table-cell>
          <table:table-cell table:style-name="ce26" office:value-type="float" office:value="0.621318" calcext:value-type="float">
            <text:p>0.621318</text:p>
          </table:table-cell>
          <table:table-cell office:value-type="float" office:value="1.264374" calcext:value-type="float">
            <text:p>1.26437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eval</text:p>
          </table:table-cell>
          <table:table-cell table:number-columns-repeated="2"/>
          <table:table-cell office:value-type="string" calcext:value-type="string">
            <text:p>ramp_2</text:p>
          </table:table-cell>
          <table:table-cell office:value-type="float" office:value="43.067056" calcext:value-type="float">
            <text:p>43.067056</text:p>
          </table:table-cell>
          <table:table-cell office:value-type="float" office:value="1.153619" calcext:value-type="float">
            <text:p>1.153619</text:p>
          </table:table-cell>
          <table:table-cell office:value-type="float" office:value="1.64946" calcext:value-type="float">
            <text:p>1.64946</text:p>
          </table:table-cell>
          <table:table-cell office:value-type="float" office:value="0.455602" calcext:value-type="float">
            <text:p>0.455602</text:p>
          </table:table-cell>
          <table:table-cell table:style-name="ce26" office:value-type="float" office:value="0.534866" calcext:value-type="float">
            <text:p>0.534866</text:p>
          </table:table-cell>
          <table:table-cell office:value-type="float" office:value="0.751539" calcext:value-type="float">
            <text:p>0.751539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ython3 evaluate.py --collision-radius 1.2</text:p>
          </table:table-cell>
          <table:table-cell table:number-columns-repeated="2"/>
          <table:table-cell office:value-type="string" calcext:value-type="string">
            <text:p>stairs</text:p>
          </table:table-cell>
          <table:table-cell office:value-type="float" office:value="116.960972" calcext:value-type="float">
            <text:p>116.960972</text:p>
          </table:table-cell>
          <table:table-cell office:value-type="float" office:value="3.423163" calcext:value-type="float">
            <text:p>3.423163</text:p>
          </table:table-cell>
          <table:table-cell office:value-type="float" office:value="1.897141" calcext:value-type="float">
            <text:p>1.897141</text:p>
          </table:table-cell>
          <table:table-cell office:value-type="float" office:value="0.482832" calcext:value-type="float">
            <text:p>0.482832</text:p>
          </table:table-cell>
          <table:table-cell table:style-name="ce26" office:value-type="float" office:value="2.321991" calcext:value-type="float">
            <text:p>2.321991</text:p>
          </table:table-cell>
          <table:table-cell office:value-type="float" office:value="4.112195" calcext:value-type="float">
            <text:p>4.112195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7"/>
          <table:table-cell table:style-name="ce7" office:value-type="string" calcext:value-type="string">
            <text:p>double</text:p>
          </table:table-cell>
          <table:table-cell table:style-name="ce13" office:value-type="float" office:value="66.688821" calcext:value-type="float">
            <text:p>66.688821</text:p>
          </table:table-cell>
          <table:table-cell table:style-name="ce13" office:value-type="float" office:value="9.682936" calcext:value-type="float">
            <text:p>9.682936</text:p>
          </table:table-cell>
          <table:table-cell table:style-name="ce13" office:value-type="float" office:value="1.607567" calcext:value-type="float">
            <text:p>1.607567</text:p>
          </table:table-cell>
          <table:table-cell table:style-name="ce13" office:value-type="float" office:value="0.47742" calcext:value-type="float">
            <text:p>0.47742</text:p>
          </table:table-cell>
          <table:table-cell table:style-name="ce27" office:value-type="float" office:value="0.58844" calcext:value-type="float">
            <text:p>0.58844</text:p>
          </table:table-cell>
          <table:table-cell table:style-name="ce27" office:value-type="float" office:value="1.329826" calcext:value-type="float">
            <text:p>1.329826</text:p>
          </table:table-cell>
          <table:table-cell table:style-name="ce27" office:value-type="float" office:value="485" calcext:value-type="float">
            <text:p>485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7" table:number-columns-repeated="2"/>
          <table:table-cell table:style-name="ce13" table:formula="of:=AVERAGE([.E22:.E30])" office:value-type="float" office:value="47.2584785555556" calcext:value-type="float">
            <text:p>47.2584785555556</text:p>
          </table:table-cell>
          <table:table-cell table:style-name="ce13" table:formula="of:=AVERAGE([.F22:.F30])" office:value-type="float" office:value="4.03561677777778" calcext:value-type="float">
            <text:p>4.03561677777778</text:p>
          </table:table-cell>
          <table:table-cell table:style-name="ce13" table:formula="of:=AVERAGE([.G22:.G30])" office:value-type="float" office:value="1.84445555555556" calcext:value-type="float">
            <text:p>1.84445555555556</text:p>
          </table:table-cell>
          <table:table-cell table:style-name="ce13" table:formula="of:=AVERAGE([.H22:.H30])" office:value-type="float" office:value="0.426511888888889" calcext:value-type="float">
            <text:p>0.426511888888889</text:p>
          </table:table-cell>
          <table:table-cell table:style-name="ce27" table:formula="of:=AVERAGE([.I22:.I25];[.I27:.I30])" office:value-type="float" office:value="1.293783125" calcext:value-type="float">
            <text:p>1.293783125</text:p>
          </table:table-cell>
          <table:table-cell table:style-name="ce27" table:formula="of:=AVERAGE([.J22:.J25];[.J27:.J30])" office:value-type="float" office:value="2.129844375" calcext:value-type="float">
            <text:p>2.129844375</text:p>
          </table:table-cell>
          <table:table-cell table:style-name="ce27" table:formula="of:=AVERAGE([.K22:.K30])" office:value-type="float" office:value="104" calcext:value-type="float">
            <text:p>104</text:p>
          </table:table-cell>
          <table:table-cell table:number-columns-repeated="2"/>
        </table:table-row>
      </table:table>
      <table:table table:name="data" table:style-name="ta1">
        <table:table-column table:style-name="co12" table:default-cell-style-name="Default"/>
        <table:table-column table:style-name="co11" table:default-cell-style-name="Default"/>
        <table:table-row table:style-name="ro3">
          <table:table-cell office:value-type="string" calcext:value-type="string">
            <text:p>Good in around:</text:p>
          </table:table-cell>
          <table:table-cell office:value-type="string" calcext:value-type="string">
            <text:p>1, 3, 8, 9, 12, 16, 17, 23, 29, 30, 33, 35, 37, 39, 40, 43, 45, 46, 47, 49, 52, 55, 62, 66, 68, 69, 71, 72, 78, 80, 81, 82, </text:p>
          </table:table-cell>
        </table:table-row>
        <table:table-row table:style-name="ro3">
          <table:table-cell office:value-type="string" calcext:value-type="string">
            <text:p>Good in direct:</text:p>
          </table:table-cell>
          <table:table-cell office:value-type="string" calcext:value-type="string">
            <text:p>15, 36, 44, 60</text:p>
          </table:table-cell>
        </table:table-row>
        <table:table-row table:style-name="ro3">
          <table:table-cell office:value-type="string" calcext:value-type="string">
            <text:p>Good in all:</text:p>
          </table:table-cell>
          <table:table-cell office:value-type="string" calcext:value-type="string">
            <text:p>1, 3, 8, 9, 12, 16, 16, 17, 23, 29, 30, 33, 35, 36, 37, 39, 40, 43, 44, 45, 46, 47, 49, 52, 55, 60, 62, 66, 68, 69, 71, 72, 78, 80, 81, 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 style:data-style-name="N2" text:time-value="06:07:29.069457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7-13T05:01:59.056283799</meta:creation-date>
    <meta:generator>LibreOffice/6.4.7.2$Linux_X86_64 LibreOffice_project/40$Build-2</meta:generator>
    <dc:date>2026-07-20T12:52:13.795078772</dc:date>
    <meta:editing-duration>P1DT20H3M5S</meta:editing-duration>
    <meta:editing-cycles>74</meta:editing-cycles>
    <meta:document-statistic meta:table-count="4" meta:cell-count="700" meta:object-count="0"/>
  </office:meta>
</office:document-meta>
</file>